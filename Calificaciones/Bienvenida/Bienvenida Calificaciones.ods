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de correo</text:p>
          </table:table-cell>
          <table:table-cell office:value-type="string">
            <text:p>Cuestionario:Evaluación Inducción (Real)</text:p>
          </table:table-cell>
          <table:table-cell office:value-type="string">
            <text:p>Cuestionario:Evaluación Inducción SST (Real)</text:p>
          </table:table-cell>
          <table:table-cell office:value-type="string">
            <text:p>Cuestionario:Evaluacion Sagrilaft y PTEE (Real)</text:p>
          </table:table-cell>
          <table:table-cell office:value-type="string">
            <text:p>Total del curso (Real)</text:p>
          </table:table-cell>
          <table:table-cell office:value-type="string">
            <text:p>Última descarga de este curso</text:p>
          </table:table-cell>
        </table:table-row>
        <table:table-row>
          <table:table-cell office:value-type="string">
            <text:p>Luis Aníbal</text:p>
          </table:table-cell>
          <table:table-cell office:value-type="string">
            <text:p>Abad Raigo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badluix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83">
            <text:p>24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NYERVIS DAVID</text:p>
          </table:table-cell>
          <table:table-cell office:value-type="string">
            <text:p>ACACIO BORG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yervisacaci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n Edisson</text:p>
          </table:table-cell>
          <table:table-cell office:value-type="string">
            <text:p>Acevedo Góm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hnacevedogomez88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ACKSON DE JESUS</text:p>
          </table:table-cell>
          <table:table-cell office:value-type="string">
            <text:p>ACEVEDO HOY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cksondejesus202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SENIA PATRICIA</text:p>
          </table:table-cell>
          <table:table-cell office:value-type="string">
            <text:p>ACEVEDO MUÑ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eniaacevedomunoz@gmail.com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Zharick Julieth</text:p>
          </table:table-cell>
          <table:table-cell office:value-type="string">
            <text:p>Acosta Alcara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carazjx@gmail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20.75">
            <text:p>20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Fernando</text:p>
          </table:table-cell>
          <table:table-cell office:value-type="string">
            <text:p>Acosta Jime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fer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Harinton Arley</text:p>
          </table:table-cell>
          <table:table-cell office:value-type="string">
            <text:p>Adar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rinton@gmail.com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Oscar Humberto</text:p>
          </table:table-cell>
          <table:table-cell office:value-type="string">
            <text:p>Adarve Pa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carparra998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a Cristina</text:p>
          </table:table-cell>
          <table:table-cell office:value-type="string">
            <text:p>Aguas Salin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inasana150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és Felipe</text:p>
          </table:table-cell>
          <table:table-cell office:value-type="string">
            <text:p>Agude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gudelocarvajal8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ISSON</text:p>
          </table:table-cell>
          <table:table-cell office:value-type="string">
            <text:p>AGUDE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iagudelo123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14.00">
            <text:p>1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ABIAN ALEXANDER</text:p>
          </table:table-cell>
          <table:table-cell office:value-type="string">
            <text:p>AGUDELO GONZA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bian.agudelo@firplak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iguel Angel</text:p>
          </table:table-cell>
          <table:table-cell office:value-type="string">
            <text:p>Agudelo Mora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119323168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NNIFER</text:p>
          </table:table-cell>
          <table:table-cell office:value-type="string">
            <text:p>AGUDELO PE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05yenny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ICARDO ANIBAL</text:p>
          </table:table-cell>
          <table:table-cell office:value-type="string">
            <text:p>AGUDELO POS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gudeloposadaricard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DAVID</text:p>
          </table:table-cell>
          <table:table-cell office:value-type="string">
            <text:p>AGUDELO PULGAR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vidbedo1234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 NOHEMI</text:p>
          </table:table-cell>
          <table:table-cell office:value-type="string">
            <text:p>AGUDELO ZAPA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a.agudelo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oberto Elías</text:p>
          </table:table-cell>
          <table:table-cell office:value-type="string">
            <text:p>Aguilar Sie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bert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ra María</text:p>
          </table:table-cell>
          <table:table-cell office:value-type="string">
            <text:p>Aguilar Sie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ra.aguilar@firpla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einaldo</text:p>
          </table:table-cell>
          <table:table-cell office:value-type="string">
            <text:p>Aguil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inaldoa@gmail.com</text:p>
          </table:table-cell>
          <table:table-cell office:value-type="float" office:value="9.67">
            <text:p>9.67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67">
            <text:p>23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 JOHANY</text:p>
          </table:table-cell>
          <table:table-cell office:value-type="string">
            <text:p>AGUIRRE ARI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joha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 Alejandro</text:p>
          </table:table-cell>
          <table:table-cell office:value-type="string">
            <text:p>Aguirre Buriticá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elburitica97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ÉS FELIPE</text:p>
          </table:table-cell>
          <table:table-cell office:value-type="string">
            <text:p>AGUIRRE GUTIÉR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fe1988@outloo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Aguirre Holgu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olguienandresfe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y Alberto</text:p>
          </table:table-cell>
          <table:table-cell office:value-type="string">
            <text:p>Aguirre Rami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ya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GAR JAVIER</text:p>
          </table:table-cell>
          <table:table-cell office:value-type="string">
            <text:p>AGULAR ROS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gar.agular@firplak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Mauricio</text:p>
          </table:table-cell>
          <table:table-cell office:value-type="string">
            <text:p>Alarc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mauricio@gmail.com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11.75">
            <text:p>11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és Felipe</text:p>
          </table:table-cell>
          <table:table-cell office:value-type="string">
            <text:p>Alarcón Ló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f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TEO ANDRES</text:p>
          </table:table-cell>
          <table:table-cell office:value-type="string">
            <text:p>ALCARA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carazmateoandres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rgio</text:p>
          </table:table-cell>
          <table:table-cell office:value-type="string">
            <text:p>Alda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rgioa1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rgio Andrés</text:p>
          </table:table-cell>
          <table:table-cell office:value-type="string">
            <text:p>Alfonso Porr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rgioa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atan Samuel</text:p>
          </table:table-cell>
          <table:table-cell office:value-type="string">
            <text:p>Almerida Borg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sab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Carlos</text:p>
          </table:table-cell>
          <table:table-cell office:value-type="string">
            <text:p>Alvara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.carlosa@gmail.com</text:p>
          </table:table-cell>
          <table:table-cell office:value-type="float" office:value="7.83">
            <text:p>7.83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0.58">
            <text:p>20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ermán Alonso</text:p>
          </table:table-cell>
          <table:table-cell office:value-type="string">
            <text:p>Álv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rmanaa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aime Andres</text:p>
          </table:table-cell>
          <table:table-cell office:value-type="string">
            <text:p>Alv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imealvar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Alberto</text:p>
          </table:table-cell>
          <table:table-cell office:value-type="string">
            <text:p>Álv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albertoa@gmail.com</text:p>
          </table:table-cell>
          <table:table-cell office:value-type="float" office:value="9.67">
            <text:p>9.67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21.42">
            <text:p>21.42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PABLO</text:p>
          </table:table-cell>
          <table:table-cell office:value-type="string">
            <text:p>ALVAREZ ALV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pabloalvarez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Álvarez Alz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elalvarezalzate0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jandro</text:p>
          </table:table-cell>
          <table:table-cell office:value-type="string">
            <text:p>Alvarez Aristizab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aa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ANDRÉS</text:p>
          </table:table-cell>
          <table:table-cell office:value-type="string">
            <text:p>ÁLVAREZ CAST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alvarezcastillo12345@gmail.com</text:p>
          </table:table-cell>
          <table:table-cell office:value-type="float" office:value="7.33">
            <text:p>7.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33">
            <text:p>7.3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air Alejandro</text:p>
          </table:table-cell>
          <table:table-cell office:value-type="string">
            <text:p>Alvarez Dávi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irdj9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LBER ANTONIO</text:p>
          </table:table-cell>
          <table:table-cell office:value-type="string">
            <text:p>ALVAREZ DUAR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d5891075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I ALEXANDER</text:p>
          </table:table-cell>
          <table:table-cell office:value-type="string">
            <text:p>ALVAREZ LONDO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varezlondonj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NYS CAROLINA</text:p>
          </table:table-cell>
          <table:table-cell office:value-type="string">
            <text:p>ÁLVAREZ MONTI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aimperialista1994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raldine</text:p>
          </table:table-cell>
          <table:table-cell office:value-type="string">
            <text:p>Álvarez Piedrahi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arezpiedrahitajeraldine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HRISTIAN</text:p>
          </table:table-cell>
          <table:table-cell office:value-type="string">
            <text:p>ALVAREZ ROM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roma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JAVIER</text:p>
          </table:table-cell>
          <table:table-cell office:value-type="string">
            <text:p>ALVAREZ ROM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varezromeroluis@gmail.com</text:p>
          </table:table-cell>
          <table:table-cell office:value-type="float" office:value="7.83">
            <text:p>7.83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0.83">
            <text:p>20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N FREDY</text:p>
          </table:table-cell>
          <table:table-cell office:value-type="string">
            <text:p>ALVAREZ VE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varezvelezjohn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rwin Duvian</text:p>
          </table:table-cell>
          <table:table-cell office:value-type="string">
            <text:p>Alz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rwinalzate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MANUEL</text:p>
          </table:table-cell>
          <table:table-cell office:value-type="string">
            <text:p>ALZATE MUÑ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CORREO345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ina Vanessa</text:p>
          </table:table-cell>
          <table:table-cell office:value-type="string">
            <text:p>Amador Pertu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naamaper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arolay</text:p>
          </table:table-cell>
          <table:table-cell office:value-type="string">
            <text:p>Amariles su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ar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ISON ANDRES</text:p>
          </table:table-cell>
          <table:table-cell office:value-type="string">
            <text:p>AMAYA PELA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tzarubis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ssica</text:p>
          </table:table-cell>
          <table:table-cell office:value-type="string">
            <text:p>Amu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ssica.amud@firpla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OMAR SANTIAGO</text:p>
          </table:table-cell>
          <table:table-cell office:value-type="string">
            <text:p>AMUD LEM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Zanty10lds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Victor Yesid</text:p>
          </table:table-cell>
          <table:table-cell office:value-type="string">
            <text:p>Andrade Mosqu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ctor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bastián</text:p>
          </table:table-cell>
          <table:table-cell office:value-type="string">
            <text:p>Andrés Cas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bastiancasillo23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Andrés Zapa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elzapata0419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Adrian</text:p>
          </table:table-cell>
          <table:table-cell office:value-type="string">
            <text:p>Angel Góm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a@gmail.com</text:p>
          </table:table-cell>
          <table:table-cell office:value-type="float" office:value="8.67">
            <text:p>8.67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3.67">
            <text:p>23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eonel</text:p>
          </table:table-cell>
          <table:table-cell office:value-type="string">
            <text:p>Angel Guerr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eonelguerrer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icardo</text:p>
          </table:table-cell>
          <table:table-cell office:value-type="string">
            <text:p>Antonio Mejí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icardomeji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A MARIA</text:p>
          </table:table-cell>
          <table:table-cell office:value-type="string">
            <text:p>ANZOLA RODRI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a.anzola436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a Fernanda</text:p>
          </table:table-cell>
          <table:table-cell office:value-type="string">
            <text:p>Ara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@gmail.com</text:p>
          </table:table-cell>
          <table:table-cell office:value-type="float" office:value="7.50">
            <text:p>7.5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0.50">
            <text:p>20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José</text:p>
          </table:table-cell>
          <table:table-cell office:value-type="string">
            <text:p>Arango Ara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JO@GMAIL.COM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1.00">
            <text:p>21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BASTIAN</text:p>
          </table:table-cell>
          <table:table-cell office:value-type="string">
            <text:p>ARANGO GOM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btianarango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1.00">
            <text:p>21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NELSON DAVID</text:p>
          </table:table-cell>
          <table:table-cell office:value-type="string">
            <text:p>ARANGO REND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vid.arango.pipito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</text:p>
          </table:table-cell>
          <table:table-cell office:value-type="string">
            <text:p>ARAQUE RAMI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aque3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XANDRA MARIA</text:p>
          </table:table-cell>
          <table:table-cell office:value-type="string">
            <text:p>ARBELADEZ C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andra.arbeladez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OVIER</text:p>
          </table:table-cell>
          <table:table-cell office:value-type="string">
            <text:p>ARBOLE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VIER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SNEIDER ALEJANDRO</text:p>
          </table:table-cell>
          <table:table-cell office:value-type="string">
            <text:p>ARBOLEDA BED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neideralejandro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TEO</text:p>
          </table:table-cell>
          <table:table-cell office:value-type="string">
            <text:p>ARBOLEDA BED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teo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AVIER HUMBERTO</text:p>
          </table:table-cell>
          <table:table-cell office:value-type="string">
            <text:p>ARBOLEDA VE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vierarboleda@gmail.com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JANDRO GABRIEL</text:p>
          </table:table-cell>
          <table:table-cell office:value-type="string">
            <text:p>ARCILA ARRIE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brielarcila13@hotmail.com</text:p>
          </table:table-cell>
          <table:table-cell office:value-type="float" office:value="10.00">
            <text:p>10.00</text:p>
          </table:table-cell>
          <table:table-cell office:value-type="float" office:value="7.50">
            <text:p>7.50</text:p>
          </table:table-cell>
          <table:table-cell office:value-type="float" office:value="3.00">
            <text:p>3.00</text:p>
          </table:table-cell>
          <table:table-cell office:value-type="float" office:value="20.50">
            <text:p>20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Arei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iagoareiz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IMON</text:p>
          </table:table-cell>
          <table:table-cell office:value-type="string">
            <text:p>AREIZA C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imonareiza97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stiven Camilo</text:p>
          </table:table-cell>
          <table:table-cell office:value-type="string">
            <text:p>Arena Mar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70590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rley Dario</text:p>
          </table:table-cell>
          <table:table-cell office:value-type="string">
            <text:p>Arenas Alv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ayanvanegas16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evin</text:p>
          </table:table-cell>
          <table:table-cell office:value-type="string">
            <text:p>Arenas Alv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vinmck177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RICARDO</text:p>
          </table:table-cell>
          <table:table-cell office:value-type="string">
            <text:p>ARENAS BARR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ricardoarenas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NATHAN DAVID</text:p>
          </table:table-cell>
          <table:table-cell office:value-type="string">
            <text:p>ARENAS RAVE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nathand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jandro Rafael</text:p>
          </table:table-cell>
          <table:table-cell office:value-type="string">
            <text:p>Ari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sualejandroarias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milo</text:p>
          </table:table-cell>
          <table:table-cell office:value-type="string">
            <text:p>Ari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milomilo27@gmail.com</text:p>
          </table:table-cell>
          <table:table-cell office:value-type="float" office:value="8.67">
            <text:p>8.67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67">
            <text:p>18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IMON EDUARDO</text:p>
          </table:table-cell>
          <table:table-cell office:value-type="string">
            <text:p>ARI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imonariaselegu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 FERNEY</text:p>
          </table:table-cell>
          <table:table-cell office:value-type="string">
            <text:p>ARIAS CRU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.arias@firplak.com</text:p>
          </table:table-cell>
          <table:table-cell office:value-type="float" office:value="8.67">
            <text:p>8.67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67">
            <text:p>18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EGO ALBERTO</text:p>
          </table:table-cell>
          <table:table-cell office:value-type="string">
            <text:p>ARIAS RESTRE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idie199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LON ALONSO</text:p>
          </table:table-cell>
          <table:table-cell office:value-type="string">
            <text:p>ARIZA GONZA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longonzalez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LSON DAVID</text:p>
          </table:table-cell>
          <table:table-cell office:value-type="string">
            <text:p>ARMIJO ALBORN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sonaguirremendoz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veiro Rafael</text:p>
          </table:table-cell>
          <table:table-cell office:value-type="string">
            <text:p>Aroca Marbe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veiroaroc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RACELLY</text:p>
          </table:table-cell>
          <table:table-cell office:value-type="string">
            <text:p>ARREDONDO NARANJ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a-619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Esteban</text:p>
          </table:table-cell>
          <table:table-cell office:value-type="string">
            <text:p>Arrieta Ot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estebanarrieta@gmail.com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erson</text:p>
          </table:table-cell>
          <table:table-cell office:value-type="string">
            <text:p>Arroya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er.arroy200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 Adrián</text:p>
          </table:table-cell>
          <table:table-cell office:value-type="string">
            <text:p>Arroya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adri123@g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21.75">
            <text:p>21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dier Bernardo</text:p>
          </table:table-cell>
          <table:table-cell office:value-type="string">
            <text:p>Arroya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ba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iguel</text:p>
          </table:table-cell>
          <table:table-cell office:value-type="string">
            <text:p>Arroya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guelarroyave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ARROYAVE BURITIC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iago.arroyave@firpla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BASTIAN</text:p>
          </table:table-cell>
          <table:table-cell office:value-type="string">
            <text:p>ARROYAVE RESTRE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bastarroyave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SUS DAVID</text:p>
          </table:table-cell>
          <table:table-cell office:value-type="string">
            <text:p>ARROY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susarroyo123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VIVIANA ANDREA</text:p>
          </table:table-cell>
          <table:table-cell office:value-type="string">
            <text:p>ARTEAGA GUE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iandre1121@hot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EINER JHOAN</text:p>
          </table:table-cell>
          <table:table-cell office:value-type="string">
            <text:p>ASCANIO PAD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canioreinerjhoa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ATAN DAVID</text:p>
          </table:table-cell>
          <table:table-cell office:value-type="string">
            <text:p>ASPRILLA ARA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onatan.asprilla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sus Andres</text:p>
          </table:table-cell>
          <table:table-cell office:value-type="string">
            <text:p>Asprilla Herna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mh110@gmail.com</text:p>
          </table:table-cell>
          <table:table-cell office:value-type="float" office:value="8.67">
            <text:p>8.67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3.67">
            <text:p>23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 CAMILO</text:p>
          </table:table-cell>
          <table:table-cell office:value-type="string">
            <text:p>ATEHORTU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422atehortu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esar</text:p>
          </table:table-cell>
          <table:table-cell office:value-type="string">
            <text:p>Augusto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dministradorcali@behome.com.co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VICTOR</text:p>
          </table:table-cell>
          <table:table-cell office:value-type="string">
            <text:p>AVILA HOLGU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ctoravilah32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83">
            <text:p>19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AN CARLOS</text:p>
          </table:table-cell>
          <table:table-cell office:value-type="string">
            <text:p>AVILES TREJ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ilesjeanc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rilyn Smith</text:p>
          </table:table-cell>
          <table:table-cell office:value-type="string">
            <text:p>Ayala Yañ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rilynayala544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ego Andres</text:p>
          </table:table-cell>
          <table:table-cell office:value-type="string">
            <text:p>Baena Bermu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gojahman@gmail.com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XIMENA</text:p>
          </table:table-cell>
          <table:table-cell office:value-type="string">
            <text:p>BALLEST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ximena.ballestas@firplak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Iván Andrés</text:p>
          </table:table-cell>
          <table:table-cell office:value-type="string">
            <text:p>Ballester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hjk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Zennuval Enriquez</text:p>
          </table:table-cell>
          <table:table-cell office:value-type="string">
            <text:p>Balsero 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zennuval91849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Brillitt Solanlli</text:p>
          </table:table-cell>
          <table:table-cell office:value-type="string">
            <text:p>Baquero Dia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angieb6515d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ustavo Andrés</text:p>
          </table:table-cell>
          <table:table-cell office:value-type="string">
            <text:p>Barbero Fuen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dfgg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Mario</text:p>
          </table:table-cell>
          <table:table-cell office:value-type="string">
            <text:p>Barce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mario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83">
            <text:p>22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ISON</text:p>
          </table:table-cell>
          <table:table-cell office:value-type="string">
            <text:p>BARRANG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isonbarragan123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MARIO</text:p>
          </table:table-cell>
          <table:table-cell office:value-type="string">
            <text:p>BARRETO PAD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barretopa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Luis</text:p>
          </table:table-cell>
          <table:table-cell office:value-type="string">
            <text:p>Barrios Calder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dgshd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BA NURY</text:p>
          </table:table-cell>
          <table:table-cell office:value-type="string">
            <text:p>BECERRA OSOR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babecerraosori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STIVEN</text:p>
          </table:table-cell>
          <table:table-cell office:value-type="string">
            <text:p>BED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tivenbedoya202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2.00">
            <text:p>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irio de Jesús</text:p>
          </table:table-cell>
          <table:table-cell office:value-type="string">
            <text:p>Bedoya Estr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iriofirplak@gmail.com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BEDOYA FLÓ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felipebedoyaflorez@gmail.com</text:p>
          </table:table-cell>
          <table:table-cell office:value-type="float" office:value="7.67">
            <text:p>7.67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6.42">
            <text:p>16.42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avid</text:p>
          </table:table-cell>
          <table:table-cell office:value-type="string">
            <text:p>Bedoya Fló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davidbf247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NA ISABEL</text:p>
          </table:table-cell>
          <table:table-cell office:value-type="string">
            <text:p>BEDOYA FLO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thias311215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Antonio</text:p>
          </table:table-cell>
          <table:table-cell office:value-type="string">
            <text:p>Bedoya Garcí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bedoyax08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hristian Mauricio</text:p>
          </table:table-cell>
          <table:table-cell office:value-type="string">
            <text:p>Bedoya Herr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piodim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xander</text:p>
          </table:table-cell>
          <table:table-cell office:value-type="string">
            <text:p>Bedoya Monsal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dhsiufhe@g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Brandon Stev</text:p>
          </table:table-cell>
          <table:table-cell office:value-type="string">
            <text:p>Bedoya Mora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andonbedoya2003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RLOS</text:p>
          </table:table-cell>
          <table:table-cell office:value-type="string">
            <text:p>BEDOYA MORA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kbemo@hotmail.com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URICIO</text:p>
          </table:table-cell>
          <table:table-cell office:value-type="string">
            <text:p>BEDOYA MUN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LAMIRADELPAISA@HOT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win Alonso</text:p>
          </table:table-cell>
          <table:table-cell office:value-type="string">
            <text:p>Bedoya Orti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b993340@gmail.com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6.00">
            <text:p>16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ISON ESTIVEN</text:p>
          </table:table-cell>
          <table:table-cell office:value-type="string">
            <text:p>BEDOYA OSOR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isonbedoya-98@hot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83">
            <text:p>19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OVANI DE JESUS</text:p>
          </table:table-cell>
          <table:table-cell office:value-type="string">
            <text:p>BEDOYA SUA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oisymonto64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AN ESTEBAN</text:p>
          </table:table-cell>
          <table:table-cell office:value-type="string">
            <text:p>BEJARANO BLAND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ejaranoblandonjoha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 JOSUE</text:p>
          </table:table-cell>
          <table:table-cell office:value-type="string">
            <text:p>BELLO RAMON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ellodaniel54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tiven</text:p>
          </table:table-cell>
          <table:table-cell office:value-type="string">
            <text:p>Beltr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ivenbb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teo</text:p>
          </table:table-cell>
          <table:table-cell office:value-type="string">
            <text:p>Benavidez Ri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prendizcontabilidad@firplak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abian Andres</text:p>
          </table:table-cell>
          <table:table-cell office:value-type="string">
            <text:p>Benít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bianbenitez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2.00">
            <text:p>2.00</text:p>
          </table:table-cell>
          <table:table-cell office:value-type="float" office:value="12.00">
            <text:p>1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JANDRA MARCELA</text:p>
          </table:table-cell>
          <table:table-cell office:value-type="string">
            <text:p>BERMUDEZ PATI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rid.mejia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o</text:p>
          </table:table-cell>
          <table:table-cell office:value-type="string">
            <text:p>Bermudez Pla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o.bermudez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Isabella</text:p>
          </table:table-cell>
          <table:table-cell office:value-type="string">
            <text:p>Bertran Barr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abellabertranbarrera08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bastián</text:p>
          </table:table-cell>
          <table:table-cell office:value-type="string">
            <text:p>Betancourt Arrub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bastian1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Felipe</text:p>
          </table:table-cell>
          <table:table-cell office:value-type="string">
            <text:p>Betancur Conra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felipebetancur88@gmail.com</text:p>
          </table:table-cell>
          <table:table-cell office:value-type="float" office:value="8.00">
            <text:p>8.0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19.75">
            <text:p>19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Valentina</text:p>
          </table:table-cell>
          <table:table-cell office:value-type="string">
            <text:p>Betancur Lo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alentinabetancurlopez749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EIDY JOHANA</text:p>
          </table:table-cell>
          <table:table-cell office:value-type="string">
            <text:p>BETANCUR OSPI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hannab.osp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EDY ALBANY</text:p>
          </table:table-cell>
          <table:table-cell office:value-type="string">
            <text:p>BETANCUR QUINT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edyalbany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uliana Alejandra</text:p>
          </table:table-cell>
          <table:table-cell office:value-type="string">
            <text:p>Betancur Vé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ulibvel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oraima</text:p>
          </table:table-cell>
          <table:table-cell office:value-type="string">
            <text:p>Betzabeth Chaiv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chaivez424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Hermes Stiven</text:p>
          </table:table-cell>
          <table:table-cell office:value-type="string">
            <text:p>Blandón Álv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rmessb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yu</text:p>
          </table:table-cell>
          <table:table-cell office:value-type="string">
            <text:p>Blandón Vé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weer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Paula Andrea</text:p>
          </table:table-cell>
          <table:table-cell office:value-type="string">
            <text:p>Bolív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ulabolivar1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ONATAN ESNEIDER</text:p>
          </table:table-cell>
          <table:table-cell office:value-type="string">
            <text:p>BOLIVAR BED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obolivarbedoya237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NURY STELLA</text:p>
          </table:table-cell>
          <table:table-cell office:value-type="string">
            <text:p>BOLIVAR RESTRE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correonocorreo@gmail.com</text:p>
          </table:table-cell>
          <table:table-cell office:value-type="float" office:value="7.50">
            <text:p>7.5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7.50">
            <text:p>17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AVID</text:p>
          </table:table-cell>
          <table:table-cell office:value-type="string">
            <text:p>BOLIVAR SER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crackmusic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N DAVID</text:p>
          </table:table-cell>
          <table:table-cell office:value-type="string">
            <text:p>BONILLA CARDEN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hndbc2017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iobanna</text:p>
          </table:table-cell>
          <table:table-cell office:value-type="string">
            <text:p>Bot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iobanna.botero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Oscar Alexander</text:p>
          </table:table-cell>
          <table:table-cell office:value-type="string">
            <text:p>Botero Roj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cara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83">
            <text:p>23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AREN LORENA</text:p>
          </table:table-cell>
          <table:table-cell office:value-type="string">
            <text:p>BUELVAS ALV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alvarez738@gmail.com</text:p>
          </table:table-cell>
          <table:table-cell office:value-type="float" office:value="7.17">
            <text:p>7.17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5.92">
            <text:p>15.92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maury del cristo</text:p>
          </table:table-cell>
          <table:table-cell office:value-type="string">
            <text:p>Buelvas de la Os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buelvas199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Iván</text:p>
          </table:table-cell>
          <table:table-cell office:value-type="string">
            <text:p>Buelvas Salaz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vanbuelvas@gmail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float" office:value="5.00">
            <text:p>5.00</text:p>
          </table:table-cell>
          <table:table-cell office:value-type="float" office:value="22.75">
            <text:p>22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lfer Alexander</text:p>
          </table:table-cell>
          <table:table-cell office:value-type="string">
            <text:p>Builes Cal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builes@outlook.com</text:p>
          </table:table-cell>
          <table:table-cell office:value-type="float" office:value="7.83">
            <text:p>7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7.83">
            <text:p>17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ury Tatiana</text:p>
          </table:table-cell>
          <table:table-cell office:value-type="string">
            <text:p>Buitrago Álv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nntr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AURA LORENA</text:p>
          </table:table-cell>
          <table:table-cell office:value-type="string">
            <text:p>BUITRAGO ARISTIZAB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buitrago33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Brayan</text:p>
          </table:table-cell>
          <table:table-cell office:value-type="string">
            <text:p>Burg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ayanburgo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iro Luis</text:p>
          </table:table-cell>
          <table:table-cell office:value-type="string">
            <text:p>Burg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ri@gmail.com</text:p>
          </table:table-cell>
          <table:table-cell office:value-type="float" office:value="7.83">
            <text:p>7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7.83">
            <text:p>17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orman Esneider</text:p>
          </table:table-cell>
          <table:table-cell office:value-type="string">
            <text:p>Bustamante Ló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ormanebl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ph Alexis</text:p>
          </table:table-cell>
          <table:table-cell office:value-type="string">
            <text:p>Bustamante Mora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stamantemoralesjosephalexi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LEONARDO</text:p>
          </table:table-cell>
          <table:table-cell office:value-type="string">
            <text:p>CABALLERO VIV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leonardovive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INDA MARIETH</text:p>
          </table:table-cell>
          <table:table-cell office:value-type="string">
            <text:p>CABANA SUESCU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ndacabana88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yelen Gabriela</text:p>
          </table:table-cell>
          <table:table-cell office:value-type="string">
            <text:p>Cabrera Chamor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yelen.cabrera@udea.edu.co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nuel Enrique</text:p>
          </table:table-cell>
          <table:table-cell office:value-type="string">
            <text:p>Cabrera Rodrí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uelec@gmail.com</text:p>
          </table:table-cell>
          <table:table-cell office:value-type="float" office:value="7.67">
            <text:p>7.67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1.67">
            <text:p>21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SEBASTIAN</text:p>
          </table:table-cell>
          <table:table-cell office:value-type="string">
            <text:p>CADAVID ARI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ylor99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adir Andres</text:p>
          </table:table-cell>
          <table:table-cell office:value-type="string">
            <text:p>Cadavid Gue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adir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a Fernanda</text:p>
          </table:table-cell>
          <table:table-cell office:value-type="string">
            <text:p>Caice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af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WIN</text:p>
          </table:table-cell>
          <table:table-cell office:value-type="string">
            <text:p>CAICEDO VARG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icedovargased2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RLEY</text:p>
          </table:table-cell>
          <table:table-cell office:value-type="string">
            <text:p>CALD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leycaldas273@gmail.com</text:p>
          </table:table-cell>
          <table:table-cell office:value-type="float" office:value="9.17">
            <text:p>9.17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17">
            <text:p>24.1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ALFREDO</text:p>
          </table:table-cell>
          <table:table-cell office:value-type="string">
            <text:p>CALDERA CARDEN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alfredocardenas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1.00">
            <text:p>21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LIECER CALLE</text:p>
          </table:table-cell>
          <table:table-cell office:value-type="string">
            <text:p>CALLE MONT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iecer8106cm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jandro</text:p>
          </table:table-cell>
          <table:table-cell office:value-type="string">
            <text:p>Calle Vás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androcalle1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 Darío</text:p>
          </table:table-cell>
          <table:table-cell office:value-type="string">
            <text:p>Calv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da@gmail.com</text:p>
          </table:table-cell>
          <table:table-cell office:value-type="float" office:value="9.00">
            <text:p>9.00</text:p>
          </table:table-cell>
          <table:table-cell office:value-type="float" office:value="7.50">
            <text:p>7.50</text:p>
          </table:table-cell>
          <table:table-cell office:value-type="float" office:value="4.00">
            <text:p>4.00</text:p>
          </table:table-cell>
          <table:table-cell office:value-type="float" office:value="20.50">
            <text:p>20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ACKELIN JUDITH</text:p>
          </table:table-cell>
          <table:table-cell office:value-type="string">
            <text:p>CALZZETA MENDO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irondavid1927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</text:p>
          </table:table-cell>
          <table:table-cell office:value-type="string">
            <text:p>Camilo San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EGO</text:p>
          </table:table-cell>
          <table:table-cell office:value-type="string">
            <text:p>CAMPI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gocampi2025@g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21.75">
            <text:p>21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NIOR DAVID</text:p>
          </table:table-cell>
          <table:table-cell office:value-type="string">
            <text:p>CAMPO SANTA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mposantanajunio3719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FELIPE</text:p>
          </table:table-cell>
          <table:table-cell office:value-type="string">
            <text:p>CAÑ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felipe123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IDA MILENA</text:p>
          </table:table-cell>
          <table:table-cell office:value-type="string">
            <text:p>CANIZALEZ TOR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da_0628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Miguel</text:p>
          </table:table-cell>
          <table:table-cell office:value-type="string">
            <text:p>C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m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uben Dario</text:p>
          </table:table-cell>
          <table:table-cell office:value-type="string">
            <text:p>Cano Benit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correo22@gmail.com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ORLANDO</text:p>
          </table:table-cell>
          <table:table-cell office:value-type="string">
            <text:p>CANO CARMO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orlando199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natan</text:p>
          </table:table-cell>
          <table:table-cell office:value-type="string">
            <text:p>Cano Echavarr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ce12@gmail.com</text:p>
          </table:table-cell>
          <table:table-cell office:value-type="float" office:value="8.67">
            <text:p>8.67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67">
            <text:p>22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ORDANY</text:p>
          </table:table-cell>
          <table:table-cell office:value-type="string">
            <text:p>CANO HIGUI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ordanyca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Viviana Alejandra</text:p>
          </table:table-cell>
          <table:table-cell office:value-type="string">
            <text:p>Cano Jaram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vianaa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83">
            <text:p>24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 ELIZABETH</text:p>
          </table:table-cell>
          <table:table-cell office:value-type="string">
            <text:p>CANO LONDO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ZCANO732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Cano Man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ic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ge Andrés</text:p>
          </table:table-cell>
          <table:table-cell office:value-type="string">
            <text:p>Cano Pa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rgecano@gmail.com</text:p>
          </table:table-cell>
          <table:table-cell office:value-type="float" office:value="7.67">
            <text:p>7.67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0.67">
            <text:p>20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uber Andrey</text:p>
          </table:table-cell>
          <table:table-cell office:value-type="string">
            <text:p>Cano Tej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re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CANO VELÁS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elvelasquezcano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</text:p>
          </table:table-cell>
          <table:table-cell office:value-type="string">
            <text:p>Cant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mdf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David</text:p>
          </table:table-cell>
          <table:table-cell office:value-type="string">
            <text:p>Cantillo Camach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dcc020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Luis</text:p>
          </table:table-cell>
          <table:table-cell office:value-type="string">
            <text:p>Carcamo Herna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lui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CARDEN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elcardenas3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ANS</text:p>
          </table:table-cell>
          <table:table-cell office:value-type="string">
            <text:p>CARDENAS DUQ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okans1989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bastián</text:p>
          </table:table-cell>
          <table:table-cell office:value-type="string">
            <text:p>Cardo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iene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</text:p>
          </table:table-cell>
          <table:table-cell office:value-type="string">
            <text:p>Cardona Arbole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mono.2392@gmail.com</text:p>
          </table:table-cell>
          <table:table-cell office:value-type="float" office:value="8.83">
            <text:p>8.83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7.58">
            <text:p>17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A MARIA</text:p>
          </table:table-cell>
          <table:table-cell office:value-type="string">
            <text:p>CARDONA CALLEJ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itacardona17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jandro</text:p>
          </table:table-cell>
          <table:table-cell office:value-type="string">
            <text:p>Cardona Cárden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andro.cardona5@udea.edu.co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ilton Duvan</text:p>
          </table:table-cell>
          <table:table-cell office:value-type="string">
            <text:p>Cardona Gom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lton8879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AN ESTEBAN</text:p>
          </table:table-cell>
          <table:table-cell office:value-type="string">
            <text:p>CARDONA JARAM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cardojaramillo20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2.00">
            <text:p>2.00</text:p>
          </table:table-cell>
          <table:table-cell office:value-type="float" office:value="21.00">
            <text:p>21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A</text:p>
          </table:table-cell>
          <table:table-cell office:value-type="string">
            <text:p>CARDONA RAMI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donaramirezdaniela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ORLAIDIS</text:p>
          </table:table-cell>
          <table:table-cell office:value-type="string">
            <text:p>CARMONA BUE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orlaidiscarmon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MILO</text:p>
          </table:table-cell>
          <table:table-cell office:value-type="string">
            <text:p>CARMONA TOR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milotorres69910502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FREDY</text:p>
          </table:table-cell>
          <table:table-cell office:value-type="string">
            <text:p>CARO MORENO 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omorenojhonf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ALEJANDRO</text:p>
          </table:table-cell>
          <table:table-cell office:value-type="string">
            <text:p>CARO TABOR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ale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rnis Said</text:p>
          </table:table-cell>
          <table:table-cell office:value-type="string">
            <text:p>Carrascal Villadie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rniscarrascal@gmail.com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float" office:value="4.00">
            <text:p>4.00</text:p>
          </table:table-cell>
          <table:table-cell office:value-type="float" office:value="19.50">
            <text:p>19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Carrasquero Paloma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eja85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CARRASQUILLA URIB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ipe.525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CARVAJ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vajalandres0219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jandro</text:p>
          </table:table-cell>
          <table:table-cell office:value-type="string">
            <text:p>Castañe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andro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milo</text:p>
          </table:table-cell>
          <table:table-cell office:value-type="string">
            <text:p>Castañeda Estr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ca2000@gmail.com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2.00">
            <text:p>2.00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INA MARCELA</text:p>
          </table:table-cell>
          <table:table-cell office:value-type="string">
            <text:p>CASTAÑEDA MARTI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eyner010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steban Franco</text:p>
          </table:table-cell>
          <table:table-cell office:value-type="string">
            <text:p>Casta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tebanfra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redy</text:p>
          </table:table-cell>
          <table:table-cell office:value-type="string">
            <text:p>Casta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edyy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ison</text:p>
          </table:table-cell>
          <table:table-cell office:value-type="string">
            <text:p>Castaño Bolañ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ison2011@gmail.com</text:p>
          </table:table-cell>
          <table:table-cell office:value-type="float" office:value="8.67">
            <text:p>8.67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67">
            <text:p>18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 CAMILA</text:p>
          </table:table-cell>
          <table:table-cell office:value-type="string">
            <text:p>CASTAÑO OSOR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a.castaño@firpla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ILBERTO</text:p>
          </table:table-cell>
          <table:table-cell office:value-type="string">
            <text:p>CASTELLANO ESPINO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stellano23edilbert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rlos</text:p>
          </table:table-cell>
          <table:table-cell office:value-type="string">
            <text:p>Castrillón Echever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castrillon94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BASTIAN</text:p>
          </table:table-cell>
          <table:table-cell office:value-type="string">
            <text:p>CASTRILLON ROM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bas0618d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steban David</text:p>
          </table:table-cell>
          <table:table-cell office:value-type="string">
            <text:p>Cast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tebanc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steban</text:p>
          </table:table-cell>
          <table:table-cell office:value-type="string">
            <text:p>Castro Aceve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teban1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a</text:p>
          </table:table-cell>
          <table:table-cell office:value-type="string">
            <text:p>Castro Cor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elitaehope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evin Alejandro</text:p>
          </table:table-cell>
          <table:table-cell office:value-type="string">
            <text:p>Castro Hoy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o.castro.hoyos99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O JAIBEL</text:p>
          </table:table-cell>
          <table:table-cell office:value-type="string">
            <text:p>CASTRO ME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lon41@gmail.com</text:p>
          </table:table-cell>
          <table:table-cell office:value-type="float" office:value="9.67">
            <text:p>9.67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67">
            <text:p>19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ALBERTO</text:p>
          </table:table-cell>
          <table:table-cell office:value-type="string">
            <text:p>CASTRO PE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ewluisk_2011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SICA VIVIANA</text:p>
          </table:table-cell>
          <table:table-cell office:value-type="string">
            <text:p>CASTRO VIA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ica.castro@firplak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ANA CAROLINA</text:p>
          </table:table-cell>
          <table:table-cell office:value-type="string">
            <text:p>CATANO ZAPA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ana.catano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gelo Andrey</text:p>
          </table:table-cell>
          <table:table-cell office:value-type="string">
            <text:p>Catrillo Cast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geloacc@gmail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1.75">
            <text:p>21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RANCISCO JAVIER</text:p>
          </table:table-cell>
          <table:table-cell office:value-type="string">
            <text:p>CELIS CONTRER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anciscocelis21@hot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N FREDY</text:p>
          </table:table-cell>
          <table:table-cell office:value-type="string">
            <text:p>CELIS LONDO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audiagiraldo119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xon Jhoan</text:p>
          </table:table-cell>
          <table:table-cell office:value-type="string">
            <text:p>Chaustre Galvis</text:p>
          </table:table-cell>
          <table:table-cell office:value-type="string">
            <text:p>1090512195</text:p>
          </table:table-cell>
          <table:table-cell office:value-type="string">
            <text:p>INEM</text:p>
          </table:table-cell>
          <table:table-cell office:value-type="string">
            <text:p>Antioquía </text:p>
          </table:table-cell>
          <table:table-cell office:value-type="string">
            <text:p>dixonchaustre0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Chavarria Mur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iagochavarria200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MILCE</text:p>
          </table:table-cell>
          <table:table-cell office:value-type="string">
            <text:p>CHAVARRIAG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ilcecs04@gmail.com</text:p>
          </table:table-cell>
          <table:table-cell office:value-type="float" office:value="8.67">
            <text:p>8.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67">
            <text:p>8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RANKY DE JESUS</text:p>
          </table:table-cell>
          <table:table-cell office:value-type="string">
            <text:p>CHAVARRIAGA ARI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anchabarriaga123@hotmail.com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rbey León</text:p>
          </table:table-cell>
          <table:table-cell office:value-type="string">
            <text:p>Chave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verraarbey436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akeline</text:p>
          </table:table-cell>
          <table:table-cell office:value-type="string">
            <text:p>Chaverra So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jh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Hector Jose</text:p>
          </table:table-cell>
          <table:table-cell office:value-type="string">
            <text:p>Chinchilla Trig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ctorjchinchill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RGIO ANDRES</text:p>
          </table:table-cell>
          <table:table-cell office:value-type="string">
            <text:p>CID CARMO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rgiocarmonacid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Miguel</text:p>
          </table:table-cell>
          <table:table-cell office:value-type="string">
            <text:p>Cifuentes Castrilló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miguel@gmail.com</text:p>
          </table:table-cell>
          <table:table-cell office:value-type="float" office:value="8.83">
            <text:p>8.83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1.83">
            <text:p>21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OCTAVIO ALEXIS</text:p>
          </table:table-cell>
          <table:table-cell office:value-type="string">
            <text:p>CIFUENTES SALAZ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xissalazar0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COGOLLO GONZA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onzalezsantiag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OLINA</text:p>
          </table:table-cell>
          <table:table-cell office:value-type="string">
            <text:p>COLLAZOS FIGUERO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olina.collazos@firplak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8.75">
            <text:p>18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FERSON ALEXANDER</text:p>
          </table:table-cell>
          <table:table-cell office:value-type="string">
            <text:p>COLMENARES FLO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RFERSONCOLMENARES2017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 Felipe</text:p>
          </table:table-cell>
          <table:table-cell office:value-type="string">
            <text:p>Colora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wert@gmail.com</text:p>
          </table:table-cell>
          <table:table-cell office:value-type="string">
            <text:p>-</text:p>
          </table:table-cell>
          <table:table-cell office:value-type="float" office:value="6.25">
            <text:p>6.25</text:p>
          </table:table-cell>
          <table:table-cell office:value-type="string">
            <text:p>-</text:p>
          </table:table-cell>
          <table:table-cell office:value-type="float" office:value="6.25">
            <text:p>6.2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CONEO ZAPA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neozapataandres7584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lson Andres</text:p>
          </table:table-cell>
          <table:table-cell office:value-type="string">
            <text:p>Copete Rodri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copeterodriguez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MERSON</text:p>
          </table:table-cell>
          <table:table-cell office:value-type="string">
            <text:p>CORDOB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rdobaemerson5637@gmail.com</text:p>
          </table:table-cell>
          <table:table-cell office:value-type="float" office:value="6.83">
            <text:p>6.83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18.58">
            <text:p>18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iguel Arnulfo</text:p>
          </table:table-cell>
          <table:table-cell office:value-type="string">
            <text:p>Córdoba Rodrí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guecordoba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ana Paola</text:p>
          </table:table-cell>
          <table:table-cell office:value-type="string">
            <text:p>Coronado Barr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hana.coronado@firplak.com</text:p>
          </table:table-cell>
          <table:table-cell office:value-type="float" office:value="6.83">
            <text:p>6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6.83">
            <text:p>16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elipe</text:p>
          </table:table-cell>
          <table:table-cell office:value-type="string">
            <text:p>Corrales Sá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rralesfelipe9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LIO CESAR</text:p>
          </table:table-cell>
          <table:table-cell office:value-type="string">
            <text:p>CORREA AGUDE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lioc@gmail.com</text:p>
          </table:table-cell>
          <table:table-cell office:value-type="float" office:value="8.67">
            <text:p>8.67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16.17">
            <text:p>16.1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ISON DAVID</text:p>
          </table:table-cell>
          <table:table-cell office:value-type="string">
            <text:p>CORREA BED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yeison445@gmail.com</text:p>
          </table:table-cell>
          <table:table-cell office:value-type="float" office:value="6.83">
            <text:p>6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6.83">
            <text:p>16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EONELA</text:p>
          </table:table-cell>
          <table:table-cell office:value-type="string">
            <text:p>CORREA BETANC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eonela.19david@gmail.com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isson Esteban</text:p>
          </table:table-cell>
          <table:table-cell office:value-type="string">
            <text:p>Correa Espino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issoncorrea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varo de Jesus</text:p>
          </table:table-cell>
          <table:table-cell office:value-type="string">
            <text:p>Correa Herr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varoch0116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RNOLDO ANTONIO</text:p>
          </table:table-cell>
          <table:table-cell office:value-type="string">
            <text:p>CORREA HIGUI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sdiajds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Esteban</text:p>
          </table:table-cell>
          <table:table-cell office:value-type="string">
            <text:p>Correa Me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.correa@firplak.com</text:p>
          </table:table-cell>
          <table:table-cell office:value-type="float" office:value="8.00">
            <text:p>8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6.75">
            <text:p>16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FERSON</text:p>
          </table:table-cell>
          <table:table-cell office:value-type="string">
            <text:p>CORREA PENAG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ferson.correa@firplak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velyn Yesed</text:p>
          </table:table-cell>
          <table:table-cell office:value-type="string">
            <text:p>Correa Ramí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lynyesedcorrearamirez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Ismael</text:p>
          </table:table-cell>
          <table:table-cell office:value-type="string">
            <text:p>Correa Restre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mael.correa@firpla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dmin Julian</text:p>
          </table:table-cell>
          <table:table-cell office:value-type="string">
            <text:p>Correa Urib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lian.correa.uribe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lian Andres</text:p>
          </table:table-cell>
          <table:table-cell office:value-type="string">
            <text:p>Correa Urib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lian.correa@firplak.com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 Alfonso</text:p>
          </table:table-cell>
          <table:table-cell office:value-type="string">
            <text:p>Cortés Galv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elcoga25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DRA LILIANA</text:p>
          </table:table-cell>
          <table:table-cell office:value-type="string">
            <text:p>CORTES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jlj@hot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Fernando</text:p>
          </table:table-cell>
          <table:table-cell office:value-type="string">
            <text:p>Cru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fernando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SUS DAVID</text:p>
          </table:table-cell>
          <table:table-cell office:value-type="string">
            <text:p>CUART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artasjesusdavid948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ward Alfonso</text:p>
          </table:table-cell>
          <table:table-cell office:value-type="string">
            <text:p>Cub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wardac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NATHAN JAVIER</text:p>
          </table:table-cell>
          <table:table-cell office:value-type="string">
            <text:p>CUERVO BARRIEN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nathannncueeerv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ALBERTO</text:p>
          </table:table-cell>
          <table:table-cell office:value-type="string">
            <text:p>CUERVO GIRAL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onac@gmail.com</text:p>
          </table:table-cell>
          <table:table-cell office:value-type="float" office:value="8.00">
            <text:p>8.0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19.75">
            <text:p>19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Fredys</text:p>
          </table:table-cell>
          <table:table-cell office:value-type="string">
            <text:p>Cuesta Pestañ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onc@gmail.com</text:p>
          </table:table-cell>
          <table:table-cell office:value-type="float" office:value="7.00">
            <text:p>7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5.75">
            <text:p>15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ANN</text:p>
          </table:table-cell>
          <table:table-cell office:value-type="string">
            <text:p>DAVID GIRAL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hann30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Felipe</text:p>
          </table:table-cell>
          <table:table-cell office:value-type="string">
            <text:p>David Urib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d9016375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oger</text:p>
          </table:table-cell>
          <table:table-cell office:value-type="string">
            <text:p>De la os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gerd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2.00">
            <text:p>2.00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TATIANA PATRICIA</text:p>
          </table:table-cell>
          <table:table-cell office:value-type="string">
            <text:p>DE LA ROSA MEDI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atdelarosa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eonel Francisco</text:p>
          </table:table-cell>
          <table:table-cell office:value-type="string">
            <text:p>Del Toro Marti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eonelf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PABLO</text:p>
          </table:table-cell>
          <table:table-cell office:value-type="string">
            <text:p>DEL TORO RAM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blodeltoror@gmail.com</text:p>
          </table:table-cell>
          <table:table-cell office:value-type="float" office:value="7.67">
            <text:p>7.67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19.42">
            <text:p>19.42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ESTEVAN</text:p>
          </table:table-cell>
          <table:table-cell office:value-type="string">
            <text:p>DELGADO PALAC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tevanlincolndelgado@g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8.75">
            <text:p>18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sus David</text:p>
          </table:table-cell>
          <table:table-cell office:value-type="string">
            <text:p>Delgado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uchodelgado_10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Ivan Andrés</text:p>
          </table:table-cell>
          <table:table-cell office:value-type="string">
            <text:p>Día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vana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</text:p>
          </table:table-cell>
          <table:table-cell office:value-type="string">
            <text:p>DIAZ BOLIV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dia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Pedro Luis</text:p>
          </table:table-cell>
          <table:table-cell office:value-type="string">
            <text:p>Díaz Herná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dro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iner Jose</text:p>
          </table:table-cell>
          <table:table-cell office:value-type="string">
            <text:p>Diaz Jarab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jdj2312einer@hotmail.com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BRAYAN ANDRES</text:p>
          </table:table-cell>
          <table:table-cell office:value-type="string">
            <text:p>DIAZ TABOR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djdih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iomar Jesus</text:p>
          </table:table-cell>
          <table:table-cell office:value-type="string">
            <text:p>Diaz Velaz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omardiaz1@gmail.com</text:p>
          </table:table-cell>
          <table:table-cell office:value-type="float" office:value="7.83">
            <text:p>7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7.83">
            <text:p>17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XANDER</text:p>
          </table:table-cell>
          <table:table-cell office:value-type="string">
            <text:p>DIEZ GI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ander34diez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BALMER SANTIAGO</text:p>
          </table:table-cell>
          <table:table-cell office:value-type="string">
            <text:p>DIEZ HERR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agoherrera199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NEIDER</text:p>
          </table:table-cell>
          <table:table-cell office:value-type="string">
            <text:p>DIEZ RUI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neider20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HIAN DANIEL</text:p>
          </table:table-cell>
          <table:table-cell office:value-type="string">
            <text:p>DIOSA ME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ronpather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AMON ALEXANDER</text:p>
          </table:table-cell>
          <table:table-cell office:value-type="string">
            <text:p>DONA RENG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anderdona02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Andrés</text:p>
          </table:table-cell>
          <table:table-cell office:value-type="string">
            <text:p>Dona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don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lon ferley</text:p>
          </table:table-cell>
          <table:table-cell office:value-type="string">
            <text:p>Duarte rang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lonf@gmail.com</text:p>
          </table:table-cell>
          <table:table-cell office:value-type="float" office:value="9.67">
            <text:p>9.67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67">
            <text:p>22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VID EDUARDO</text:p>
          </table:table-cell>
          <table:table-cell office:value-type="string">
            <text:p>DUARTE ROJ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vid.duarte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ellis Tatiana</text:p>
          </table:table-cell>
          <table:table-cell office:value-type="string">
            <text:p>Duq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taduve@g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2.75">
            <text:p>22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LAUDIA LORENA</text:p>
          </table:table-cell>
          <table:table-cell office:value-type="string">
            <text:p>DUQUE ALZ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reccionfinanciera@firplak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AURA ISABEL</text:p>
          </table:table-cell>
          <table:table-cell office:value-type="string">
            <text:p>DUQUE LO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aura.duque@firplak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Jairo</text:p>
          </table:table-cell>
          <table:table-cell office:value-type="string">
            <text:p>Durán Higui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uranjhon310@gmail.com</text:p>
          </table:table-cell>
          <table:table-cell office:value-type="float" office:value="5.83">
            <text:p>5.83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4.58">
            <text:p>14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David</text:p>
          </table:table-cell>
          <table:table-cell office:value-type="string">
            <text:p>Durán Suá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d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teven</text:p>
          </table:table-cell>
          <table:table-cell office:value-type="string">
            <text:p>Duran Varg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ricsamu@outlook.es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float" office:value="5.00">
            <text:p>5.00</text:p>
          </table:table-cell>
          <table:table-cell office:value-type="float" office:value="22.75">
            <text:p>22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Manuel</text:p>
          </table:table-cell>
          <table:table-cell office:value-type="string">
            <text:p>Dura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manueldurangos@gmail.com</text:p>
          </table:table-cell>
          <table:table-cell office:value-type="float" office:value="7.83">
            <text:p>7.83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0.83">
            <text:p>20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eimer</text:p>
          </table:table-cell>
          <table:table-cell office:value-type="string">
            <text:p>Durango Val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imerduva@gmail.com</text:p>
          </table:table-cell>
          <table:table-cell office:value-type="float" office:value="8.67">
            <text:p>8.67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1.42">
            <text:p>21.42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z María</text:p>
          </table:table-cell>
          <table:table-cell office:value-type="string">
            <text:p>Echeverri C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zmariaecano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83">
            <text:p>19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EVIN</text:p>
          </table:table-cell>
          <table:table-cell office:value-type="string">
            <text:p>ECHEVERRI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vin.s1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vid Santiago</text:p>
          </table:table-cell>
          <table:table-cell office:value-type="string">
            <text:p>Echever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iagodenasared15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Echever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iagoecheverry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VELASQUEZ ARRIOLA</text:p>
          </table:table-cell>
          <table:table-cell office:value-type="string">
            <text:p>ENRIQUE CAR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riquelili072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ESCALAN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CORREO12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 Isabel</text:p>
          </table:table-cell>
          <table:table-cell office:value-type="string">
            <text:p>Escob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is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Guillermo</text:p>
          </table:table-cell>
          <table:table-cell office:value-type="string">
            <text:p>Escobar Borj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.escobar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OLINA</text:p>
          </table:table-cell>
          <table:table-cell office:value-type="string">
            <text:p>ESCOBAR MADR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olina.escobar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ÉS ESTEBAN</text:p>
          </table:table-cell>
          <table:table-cell office:value-type="string">
            <text:p>ESCOBAR RÚ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perstarblak@gmail.com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 Camilo</text:p>
          </table:table-cell>
          <table:table-cell office:value-type="string">
            <text:p>Espinal Álv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c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SNEIDER</text:p>
          </table:table-cell>
          <table:table-cell office:value-type="string">
            <text:p>ESPINAL MONTA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3117071990@gmail.com</text:p>
          </table:table-cell>
          <table:table-cell office:value-type="float" office:value="8.50">
            <text:p>8.5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50">
            <text:p>18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GIE PAOLA</text:p>
          </table:table-cell>
          <table:table-cell office:value-type="string">
            <text:p>ESPINOSA CHANC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giepao998@hotmail.es</text:p>
          </table:table-cell>
          <table:table-cell office:value-type="float" office:value="7.00">
            <text:p>7.0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14.50">
            <text:p>14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EGO ARMANDO</text:p>
          </table:table-cell>
          <table:table-cell office:value-type="string">
            <text:p>ESPINOZA VELAS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goarmandoespiez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eonardo José</text:p>
          </table:table-cell>
          <table:table-cell office:value-type="string">
            <text:p>Esquivel Ávi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loreznancy571@gmail.com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6.00">
            <text:p>16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YEISON</text:p>
          </table:table-cell>
          <table:table-cell office:value-type="string">
            <text:p>ESQUIVEL GUTIÉR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yesquivel@misena.edu.co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ston</text:p>
          </table:table-cell>
          <table:table-cell office:value-type="string">
            <text:p>Estev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stone@gmail.com</text:p>
          </table:table-cell>
          <table:table-cell office:value-type="float" office:value="7.83">
            <text:p>7.83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1.83">
            <text:p>21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Henrry Jose</text:p>
          </table:table-cell>
          <table:table-cell office:value-type="string">
            <text:p>Estevez Del Pra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moo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José</text:p>
          </table:table-cell>
          <table:table-cell office:value-type="string">
            <text:p>Estrada Flo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flores26086282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AN CAMILO</text:p>
          </table:table-cell>
          <table:table-cell office:value-type="string">
            <text:p>ESTRADA LO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hanc.08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leider</text:p>
          </table:table-cell>
          <table:table-cell office:value-type="string">
            <text:p>Far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eider111@gmail.com</text:p>
          </table:table-cell>
          <table:table-cell office:value-type="float" office:value="9.83">
            <text:p>9.83</text:p>
          </table:table-cell>
          <table:table-cell office:value-type="float" office:value="8.75">
            <text:p>8.75</text:p>
          </table:table-cell>
          <table:table-cell office:value-type="float" office:value="5.00">
            <text:p>5.00</text:p>
          </table:table-cell>
          <table:table-cell office:value-type="float" office:value="23.58">
            <text:p>23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Fernández Góm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iagof@gmail.com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AN ALEJANDRO</text:p>
          </table:table-cell>
          <table:table-cell office:value-type="string">
            <text:p>FERNANDEZ GUTIER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andro.fernandez@firpla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 Isabel</text:p>
          </table:table-cell>
          <table:table-cell office:value-type="string">
            <text:p>Fernández Higui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aisabel@gmail.com</text:p>
          </table:table-cell>
          <table:table-cell office:value-type="float" office:value="8.83">
            <text:p>8.83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3.83">
            <text:p>23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drian Alexander</text:p>
          </table:table-cell>
          <table:table-cell office:value-type="string">
            <text:p>Flores Fuen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drianf038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vid Andrey</text:p>
          </table:table-cell>
          <table:table-cell office:value-type="string">
            <text:p>Fló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vidaf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REDY ALBERTO</text:p>
          </table:table-cell>
          <table:table-cell office:value-type="string">
            <text:p>FLO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ULIMONFLOR@HOTMAIL.COM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iguel Enrique</text:p>
          </table:table-cell>
          <table:table-cell office:value-type="string">
            <text:p>Flo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guelflorez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83">
            <text:p>23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na</text:p>
          </table:table-cell>
          <table:table-cell office:value-type="string">
            <text:p>Flórez Arbole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ana200301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AIDER DE JESUS</text:p>
          </table:table-cell>
          <table:table-cell office:value-type="string">
            <text:p>FLOREZ BARRI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ider12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1.00">
            <text:p>21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XANDRA MARIA</text:p>
          </table:table-cell>
          <table:table-cell office:value-type="string">
            <text:p>FLOREZ MUÑ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andra.florez@firplak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UARD ANDRES</text:p>
          </table:table-cell>
          <table:table-cell office:value-type="string">
            <text:p>FRANCO MEJ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uardandresfranc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milo</text:p>
          </table:table-cell>
          <table:table-cell office:value-type="string">
            <text:p>Fuen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cafuentes@gmail.com</text:p>
          </table:table-cell>
          <table:table-cell office:value-type="float" office:value="8.83">
            <text:p>8.83</text:p>
          </table:table-cell>
          <table:table-cell office:value-type="float" office:value="7.50">
            <text:p>7.50</text:p>
          </table:table-cell>
          <table:table-cell office:value-type="float" office:value="3.00">
            <text:p>3.00</text:p>
          </table:table-cell>
          <table:table-cell office:value-type="float" office:value="19.33">
            <text:p>19.3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BASTIAN</text:p>
          </table:table-cell>
          <table:table-cell office:value-type="string">
            <text:p>GALEANO HERR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basgaleano202031@outlook.es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É ALBERTO</text:p>
          </table:table-cell>
          <table:table-cell office:value-type="string">
            <text:p>GALLEGO GALLE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llegojose355@gmail.com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XANDER</text:p>
          </table:table-cell>
          <table:table-cell office:value-type="string">
            <text:p>GALLEGO OLIV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alkiidia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A MARÍA</text:p>
          </table:table-cell>
          <table:table-cell office:value-type="string">
            <text:p>GALLO ECHEVERR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amariaecheverri198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INDY PAOLA</text:p>
          </table:table-cell>
          <table:table-cell office:value-type="string">
            <text:p>GALVAN MUÑ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INDYGALVAN04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Galvis Echever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el2024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VER ANDRES</text:p>
          </table:table-cell>
          <table:table-cell office:value-type="string">
            <text:p>GALVIS PATI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vgfj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nathan Antonio</text:p>
          </table:table-cell>
          <table:table-cell office:value-type="string">
            <text:p>Garcí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nathangarci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Pablo</text:p>
          </table:table-cell>
          <table:table-cell office:value-type="string">
            <text:p>Garcí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pa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XANDER</text:p>
          </table:table-cell>
          <table:table-cell office:value-type="string">
            <text:p>GARCIA BERMU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zgarcia500@gmail.com</text:p>
          </table:table-cell>
          <table:table-cell office:value-type="float" office:value="8.00">
            <text:p>8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6.75">
            <text:p>16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Fredy</text:p>
          </table:table-cell>
          <table:table-cell office:value-type="string">
            <text:p>García Jimé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wpass-tag@live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ABRIEL</text:p>
          </table:table-cell>
          <table:table-cell office:value-type="string">
            <text:p>GARCIA MARTI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rciamartinesgabi@gmail.com</text:p>
          </table:table-cell>
          <table:table-cell office:value-type="float" office:value="8.83">
            <text:p>8.83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83">
            <text:p>22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ILDARDO ALONSO</text:p>
          </table:table-cell>
          <table:table-cell office:value-type="string">
            <text:p>GARCIA MUÑ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LAUJOHANA0205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amer</text:p>
          </table:table-cell>
          <table:table-cell office:value-type="string">
            <text:p>García Restre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mergarciarestrep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lmar</text:p>
          </table:table-cell>
          <table:table-cell office:value-type="string">
            <text:p>García Restre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margarci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García Rodri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iagogarciac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ORA INES</text:p>
          </table:table-cell>
          <table:table-cell office:value-type="string">
            <text:p>GARCIA TANGAR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oingar1972@g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AIDER ALONSO</text:p>
          </table:table-cell>
          <table:table-cell office:value-type="string">
            <text:p>GARCIA VALEN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ideralond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DISON</text:p>
          </table:table-cell>
          <table:table-cell office:value-type="string">
            <text:p>GARCIA ZAPA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dison.Garcia.zapata@gam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ge Luis</text:p>
          </table:table-cell>
          <table:table-cell office:value-type="string">
            <text:p>Garzón Peñalo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rgel@gmail.com</text:p>
          </table:table-cell>
          <table:table-cell office:value-type="float" office:value="8.00">
            <text:p>8.00</text:p>
          </table:table-cell>
          <table:table-cell office:value-type="float" office:value="8.75">
            <text:p>8.75</text:p>
          </table:table-cell>
          <table:table-cell office:value-type="float" office:value="5.00">
            <text:p>5.00</text:p>
          </table:table-cell>
          <table:table-cell office:value-type="float" office:value="21.75">
            <text:p>21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a Michel</text:p>
          </table:table-cell>
          <table:table-cell office:value-type="string">
            <text:p>Gavir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a.gaviri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ALTER DARIO</text:p>
          </table:table-cell>
          <table:table-cell office:value-type="string">
            <text:p>GAVIRIA ECHEVER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viriaw38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urany Andrea</text:p>
          </table:table-cell>
          <table:table-cell office:value-type="string">
            <text:p>Gi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uragil1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bastian</text:p>
          </table:table-cell>
          <table:table-cell office:value-type="string">
            <text:p>Gil Aba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bassimon09_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ALEJANDRO</text:p>
          </table:table-cell>
          <table:table-cell office:value-type="string">
            <text:p>GIL GOM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gilgo37@gmail.com</text:p>
          </table:table-cell>
          <table:table-cell office:value-type="float" office:value="7.83">
            <text:p>7.83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2.83">
            <text:p>22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A CRISTINA</text:p>
          </table:table-cell>
          <table:table-cell office:value-type="string">
            <text:p>GIL GONZA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NDADANI35@HOT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GE ELIECER</text:p>
          </table:table-cell>
          <table:table-cell office:value-type="string">
            <text:p>GIL MONT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rgeeliecergilmontoya@gmail.com</text:p>
          </table:table-cell>
          <table:table-cell office:value-type="float" office:value="8.83">
            <text:p>8.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83">
            <text:p>8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EIVID JOHAN</text:p>
          </table:table-cell>
          <table:table-cell office:value-type="string">
            <text:p>GIRALDO ARA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angogiraldodeivid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TA EUGENIA</text:p>
          </table:table-cell>
          <table:table-cell office:value-type="string">
            <text:p>GIRALDO ARISTIZAB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ta.giraldo@firpla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iego</text:p>
          </table:table-cell>
          <table:table-cell office:value-type="string">
            <text:p>Giraldo Avenda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ndanojuan372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Brayan Estiven</text:p>
          </table:table-cell>
          <table:table-cell office:value-type="string">
            <text:p>Giraldo Betanc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ayanestivengiraldobetancur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83">
            <text:p>19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José</text:p>
          </table:table-cell>
          <table:table-cell office:value-type="string">
            <text:p>Giraldo Cas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mesequip22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y Esteban</text:p>
          </table:table-cell>
          <table:table-cell office:value-type="string">
            <text:p>Giraldo Góm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ye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harlie Arthur</text:p>
          </table:table-cell>
          <table:table-cell office:value-type="string">
            <text:p>Giraldo Góm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rliee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ALBERTO</text:p>
          </table:table-cell>
          <table:table-cell office:value-type="string">
            <text:p>GIRALDO MAZ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pegima@hot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8.75">
            <text:p>18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ORLAY</text:p>
          </table:table-cell>
          <table:table-cell office:value-type="string">
            <text:p>GIRALDO PESCAD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oblack@hotmail.es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a Fernanda</text:p>
          </table:table-cell>
          <table:table-cell office:value-type="string">
            <text:p>Giraldo Tor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a.fda220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ERSSON JULIAN</text:p>
          </table:table-cell>
          <table:table-cell office:value-type="string">
            <text:p>GIRALDO VAS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iraldovasquezandersson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LAN ALEJANDRO</text:p>
          </table:table-cell>
          <table:table-cell office:value-type="string">
            <text:p>GIRON GAR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lana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aniri Miret</text:p>
          </table:table-cell>
          <table:table-cell office:value-type="string">
            <text:p>Godoy Escalo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anirigodoy202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a Sofía</text:p>
          </table:table-cell>
          <table:table-cell office:value-type="string">
            <text:p>Góm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avillarragag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Alexander</text:p>
          </table:table-cell>
          <table:table-cell office:value-type="string">
            <text:p>Góm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onag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CELA</text:p>
          </table:table-cell>
          <table:table-cell office:value-type="string">
            <text:p>GOMEZ AGUDE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cela.gomez@firplak.com</text:p>
          </table:table-cell>
          <table:table-cell office:value-type="float" office:value="9.67">
            <text:p>9.67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67">
            <text:p>19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INA MARCELA</text:p>
          </table:table-cell>
          <table:table-cell office:value-type="string">
            <text:p>GÓMEZ BAN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namarcelalulu16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OLINA</text:p>
          </table:table-cell>
          <table:table-cell office:value-type="string">
            <text:p>GOMEZ BED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olina.gomez@firplak.com</text:p>
          </table:table-cell>
          <table:table-cell office:value-type="float" office:value="4.00">
            <text:p>4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4.00">
            <text:p>1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 Antonio</text:p>
          </table:table-cell>
          <table:table-cell office:value-type="string">
            <text:p>Gomez Borj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el1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AN DAVID</text:p>
          </table:table-cell>
          <table:table-cell office:value-type="string">
            <text:p>GOMEZ DE LA H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omezjh4@gmail.com</text:p>
          </table:table-cell>
          <table:table-cell office:value-type="float" office:value="9.83">
            <text:p>9.83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2.58">
            <text:p>22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BASTIAN</text:p>
          </table:table-cell>
          <table:table-cell office:value-type="string">
            <text:p>GOMEZ FLO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omezflorezsebastian@gmail.com</text:p>
          </table:table-cell>
          <table:table-cell office:value-type="float" office:value="8.83">
            <text:p>8.83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3.83">
            <text:p>23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lizabeth</text:p>
          </table:table-cell>
          <table:table-cell office:value-type="string">
            <text:p>Gomez Gutier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igo1989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ESTIVEN</text:p>
          </table:table-cell>
          <table:table-cell office:value-type="string">
            <text:p>GOMEZ MUR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tivengomez07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EÓN FERNANDO</text:p>
          </table:table-cell>
          <table:table-cell office:value-type="string">
            <text:p>GOMEZ OSPI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e18@hotmail.es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AN ANDRES</text:p>
          </table:table-cell>
          <table:table-cell office:value-type="string">
            <text:p>GÓMEZ RESTRE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miandres24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Fernando</text:p>
          </table:table-cell>
          <table:table-cell office:value-type="string">
            <text:p>Gómez Rodri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fer11@gmail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20.75">
            <text:p>20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LMER ANDRES</text:p>
          </table:table-cell>
          <table:table-cell office:value-type="string">
            <text:p>GOMEZ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mer2832gom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rika Natalia</text:p>
          </table:table-cell>
          <table:table-cell office:value-type="string">
            <text:p>Gomez Usm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dministradormedellin@behome.com.co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UICELA ANDREA</text:p>
          </table:table-cell>
          <table:table-cell office:value-type="string">
            <text:p>GOMEZ USM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a.gomez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avid</text:p>
          </table:table-cell>
          <table:table-cell office:value-type="string">
            <text:p>Gómez Vé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d34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JANDRO</text:p>
          </table:table-cell>
          <table:table-cell office:value-type="string">
            <text:p>GONZA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gocano@gmail.com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Pablo</text:p>
          </table:table-cell>
          <table:table-cell office:value-type="string">
            <text:p>Gonzá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234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aren Dayana</text:p>
          </table:table-cell>
          <table:table-cell office:value-type="string">
            <text:p>González Agude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onzalezagudelokaren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Fernando</text:p>
          </table:table-cell>
          <table:table-cell office:value-type="string">
            <text:p>Gonzalez Bed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ercialmedellin@behome.com.co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AILA ZOBEIDA</text:p>
          </table:table-cell>
          <table:table-cell office:value-type="string">
            <text:p>GONZALEZ CAST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tajyj@live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Isabel</text:p>
          </table:table-cell>
          <table:table-cell office:value-type="string">
            <text:p>González Cháv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abelgo12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83">
            <text:p>24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vid</text:p>
          </table:table-cell>
          <table:table-cell office:value-type="string">
            <text:p>Gonzalez Cor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VIDGONZALEZ@GMAIL.COM</text:p>
          </table:table-cell>
          <table:table-cell office:value-type="float" office:value="8.50">
            <text:p>8.5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1.50">
            <text:p>21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USTAVO ADOLFO</text:p>
          </table:table-cell>
          <table:table-cell office:value-type="string">
            <text:p>GONZALEZ LONDO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USTAVOGONZALEZ1020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varo Alejandro</text:p>
          </table:table-cell>
          <table:table-cell office:value-type="string">
            <text:p>Gonzalez Marti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gonzalezmartinez8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esar Francisco</text:p>
          </table:table-cell>
          <table:table-cell office:value-type="string">
            <text:p>González Mendo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mejorde1995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RICA</text:p>
          </table:table-cell>
          <table:table-cell office:value-type="string">
            <text:p>GONZALEZ PALAC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ricagonzalezp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MER</text:p>
          </table:table-cell>
          <table:table-cell office:value-type="string">
            <text:p>GONZA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mervergara1976@hot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Ivan Andres</text:p>
          </table:table-cell>
          <table:table-cell office:value-type="string">
            <text:p>Gordon Nava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vangordonnavarro@gmail.com</text:p>
          </table:table-cell>
          <table:table-cell office:value-type="float" office:value="7.83">
            <text:p>7.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83">
            <text:p>7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erson</text:p>
          </table:table-cell>
          <table:table-cell office:value-type="string">
            <text:p>Graciano Varg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ergr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Paula andrea</text:p>
          </table:table-cell>
          <table:table-cell office:value-type="string">
            <text:p>Grajales Bot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rajalesboterop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laudia Patricia</text:p>
          </table:table-cell>
          <table:table-cell office:value-type="string">
            <text:p>Granada Váz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ttricia.granada0330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ssica Maria</text:p>
          </table:table-cell>
          <table:table-cell office:value-type="string">
            <text:p>Grisales Galle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ssicagrigalleg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lson Ferney</text:p>
          </table:table-cell>
          <table:table-cell office:value-type="string">
            <text:p>Grisales Gar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sdf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PAMELA</text:p>
          </table:table-cell>
          <table:table-cell office:value-type="string">
            <text:p>GRISALEZ ARI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melagrisales99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n Jairo</text:p>
          </table:table-cell>
          <table:table-cell office:value-type="string">
            <text:p>Guarin Valen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hn73guarin@gmail.com</text:p>
          </table:table-cell>
          <table:table-cell office:value-type="float" office:value="6.83">
            <text:p>6.83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5.58">
            <text:p>15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eiver David</text:p>
          </table:table-cell>
          <table:table-cell office:value-type="string">
            <text:p>Guerra Ló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zlopezhoyos29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lman Andrés</text:p>
          </table:table-cell>
          <table:table-cell office:value-type="string">
            <text:p>Guerra Noreñ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uerraandres88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MILO</text:p>
          </table:table-cell>
          <table:table-cell office:value-type="string">
            <text:p>GUERRA ZAPA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ca@gmail.com</text:p>
          </table:table-cell>
          <table:table-cell office:value-type="float" office:value="7.67">
            <text:p>7.67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2.67">
            <text:p>22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Santiago</text:p>
          </table:table-cell>
          <table:table-cell office:value-type="string">
            <text:p>Guerr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guerrer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ERNANDO</text:p>
          </table:table-cell>
          <table:table-cell office:value-type="string">
            <text:p>GUERRERO LU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daseb@hotmail.es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GUERRERO TEJ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uerrerotejadapipe@gmail.com</text:p>
          </table:table-cell>
          <table:table-cell office:value-type="float" office:value="7.50">
            <text:p>7.50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0.25">
            <text:p>20.2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Darwin</text:p>
          </table:table-cell>
          <table:table-cell office:value-type="string">
            <text:p>Guerrero Trej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ond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olimar Patricia</text:p>
          </table:table-cell>
          <table:table-cell office:value-type="string">
            <text:p>Gueva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olimar_02d@hotmail.com</text:p>
          </table:table-cell>
          <table:table-cell office:value-type="float" office:value="7.83">
            <text:p>7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7.83">
            <text:p>17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PAULA ANDREA</text:p>
          </table:table-cell>
          <table:table-cell office:value-type="string">
            <text:p>GUEVARA ALV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ula.guevara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erson Duvan</text:p>
          </table:table-cell>
          <table:table-cell office:value-type="string">
            <text:p>Guevara Bermu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erlou2813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ALEXIS</text:p>
          </table:table-cell>
          <table:table-cell office:value-type="string">
            <text:p>GUISAO MONT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alexismontoya200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Oscar Andres</text:p>
          </table:table-cell>
          <table:table-cell office:value-type="string">
            <text:p>Gutierrez Amb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mbito14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ISSON ADRIAN</text:p>
          </table:table-cell>
          <table:table-cell office:value-type="string">
            <text:p>GUTIERREZ CARDEN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rson25518@gmail.com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Esteban</text:p>
          </table:table-cell>
          <table:table-cell office:value-type="string">
            <text:p>Gutierrez Chanc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estebanchanci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 ANGELICA</text:p>
          </table:table-cell>
          <table:table-cell office:value-type="string">
            <text:p>GUTIERREZ CHIIRIN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ahurren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LIAN ANDRES</text:p>
          </table:table-cell>
          <table:table-cell office:value-type="string">
            <text:p>GUTIERREZ FLO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utierrezjulianandres474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83">
            <text:p>23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ibardo Antonio</text:p>
          </table:table-cell>
          <table:table-cell office:value-type="string">
            <text:p>Gutierrez Gale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bardogutierrez8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GE ALBERTO</text:p>
          </table:table-cell>
          <table:table-cell office:value-type="string">
            <text:p>GUTIERREZ GIRAL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RGEGUTIERREZSIG@YAHOO.ES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Fernando</text:p>
          </table:table-cell>
          <table:table-cell office:value-type="string">
            <text:p>Gutiérrez Gran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fgg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xander</text:p>
          </table:table-cell>
          <table:table-cell office:value-type="string">
            <text:p>Gutiérrez Lengu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sagdua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teven</text:p>
          </table:table-cell>
          <table:table-cell office:value-type="string">
            <text:p>Gutiérrez Marulan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gm@gmail.com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7.00">
            <text:p>17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GUTIERREZ MONT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iagogutierrezmont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GE ELIECER</text:p>
          </table:table-cell>
          <table:table-cell office:value-type="string">
            <text:p>GUTIERREZ POS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rgee12@gmail.com</text:p>
          </table:table-cell>
          <table:table-cell office:value-type="float" office:value="8.67">
            <text:p>8.67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3.67">
            <text:p>23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stiven</text:p>
          </table:table-cell>
          <table:table-cell office:value-type="string">
            <text:p>Gutierrez Rí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tiveng12@gmail.com</text:p>
          </table:table-cell>
          <table:table-cell office:value-type="float" office:value="9.83">
            <text:p>9.83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2.58">
            <text:p>22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INA DEL CARMEN</text:p>
          </table:table-cell>
          <table:table-cell office:value-type="string">
            <text:p>GUTIERREZ TUBERQU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nagutierrez324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drian Ardey</text:p>
          </table:table-cell>
          <table:table-cell office:value-type="string">
            <text:p>Gutierrez Zapa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drianzapatagu7493@g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21.75">
            <text:p>21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avid</text:p>
          </table:table-cell>
          <table:table-cell office:value-type="string">
            <text:p>Guzman Lo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vidiablito132@hot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83">
            <text:p>24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ONICA ANDREA</text:p>
          </table:table-cell>
          <table:table-cell office:value-type="string">
            <text:p>GUZMAN MENES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icaguzman1515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RGIO ANDRÉS</text:p>
          </table:table-cell>
          <table:table-cell office:value-type="string">
            <text:p>GUZMÁN MENES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RGIOANDRESGUZMANMENESES8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ison Andres</text:p>
          </table:table-cell>
          <table:table-cell office:value-type="string">
            <text:p>Guzmán Santamar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isonandres621@gmail.com</text:p>
          </table:table-cell>
          <table:table-cell office:value-type="float" office:value="7.83">
            <text:p>7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7.83">
            <text:p>17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milo</text:p>
          </table:table-cell>
          <table:table-cell office:value-type="string">
            <text:p>Hena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camilo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mila</text:p>
          </table:table-cell>
          <table:table-cell office:value-type="string">
            <text:p>Henao de la Pa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milahenaodelapava21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Henao Garcí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iagohg1997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ina Maria</text:p>
          </table:table-cell>
          <table:table-cell office:value-type="string">
            <text:p>Henao Gi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namariahenaogil81@gmail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7.75">
            <text:p>17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EIDY MANUELA</text:p>
          </table:table-cell>
          <table:table-cell office:value-type="string">
            <text:p>HENAO OSOR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leidymanuel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AMID EDILSON</text:p>
          </table:table-cell>
          <table:table-cell office:value-type="string">
            <text:p>HENAO OSOR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amidheos@g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jandro David</text:p>
          </table:table-cell>
          <table:table-cell office:value-type="string">
            <text:p>Henao Tangar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vid.henao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lian Andres</text:p>
          </table:table-cell>
          <table:table-cell office:value-type="string">
            <text:p>Henao Tangar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enao98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HENRY</text:p>
          </table:table-cell>
          <table:table-cell office:value-type="string">
            <text:p>HENAO VALEN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nry202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onica Maria</text:p>
          </table:table-cell>
          <table:table-cell office:value-type="string">
            <text:p>Henao vas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-arte.s.a.s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jandra</text:p>
          </table:table-cell>
          <table:table-cell office:value-type="string">
            <text:p>Herná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andrah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vid Cardona</text:p>
          </table:table-cell>
          <table:table-cell office:value-type="string">
            <text:p>Herná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vidcar1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ISSON ARLEY</text:p>
          </table:table-cell>
          <table:table-cell office:value-type="string">
            <text:p>HERNA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ison.arley1145@g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2.75">
            <text:p>22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GREGORIO</text:p>
          </table:table-cell>
          <table:table-cell office:value-type="string">
            <text:p>HERNÁ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androbrown8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lián Alberto</text:p>
          </table:table-cell>
          <table:table-cell office:value-type="string">
            <text:p>Herná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lianhernand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aterin Alejandra</text:p>
          </table:table-cell>
          <table:table-cell office:value-type="string">
            <text:p>Herná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aterinale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z Amalia</text:p>
          </table:table-cell>
          <table:table-cell office:value-type="string">
            <text:p>Herná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za@gmail.com</text:p>
          </table:table-cell>
          <table:table-cell office:value-type="float" office:value="7.83">
            <text:p>7.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83">
            <text:p>7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rwin Antonio</text:p>
          </table:table-cell>
          <table:table-cell office:value-type="string">
            <text:p>Hernández Bal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mmm@gmail.com</text:p>
          </table:table-cell>
          <table:table-cell office:value-type="float" office:value="8.83">
            <text:p>8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83">
            <text:p>18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Hector Orlando</text:p>
          </table:table-cell>
          <table:table-cell office:value-type="string">
            <text:p>Hernandez Blan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omeriajob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ana</text:p>
          </table:table-cell>
          <table:table-cell office:value-type="string">
            <text:p>Hernandez Esgue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ana.hernandez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ILBERTO</text:p>
          </table:table-cell>
          <table:table-cell office:value-type="string">
            <text:p>HERNANDEZ FONSEC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rnandezfonsecaedilberto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RI MAURICIO</text:p>
          </table:table-cell>
          <table:table-cell office:value-type="string">
            <text:p>HERNANDEZ FONSEC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rickyzherick@gmail.com</text:p>
          </table:table-cell>
          <table:table-cell office:value-type="float" office:value="6.67">
            <text:p>6.67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0.67">
            <text:p>20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Victor Julio</text:p>
          </table:table-cell>
          <table:table-cell office:value-type="string">
            <text:p>Hernandez Gonza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ctorinos35.hv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PABLO</text:p>
          </table:table-cell>
          <table:table-cell office:value-type="string">
            <text:p>HERNANDEZ ISA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parr88321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ULY ALEJANDRA</text:p>
          </table:table-cell>
          <table:table-cell office:value-type="string">
            <text:p>HERNANDEZ LAZA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uly__hernandez@outlook.es</text:p>
          </table:table-cell>
          <table:table-cell office:value-type="float" office:value="7.00">
            <text:p>7.0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14.50">
            <text:p>14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 EDUARDO</text:p>
          </table:table-cell>
          <table:table-cell office:value-type="string">
            <text:p>HERNANDEZ MANT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uardomant98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AFAEL ALEXANDER</text:p>
          </table:table-cell>
          <table:table-cell office:value-type="string">
            <text:p>HERNÁNDEZ PAD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h38775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MILO</text:p>
          </table:table-cell>
          <table:table-cell office:value-type="string">
            <text:p>HERNANDEZ SALAZ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rnandezsalazarjuancamilo14@gmail.com</text:p>
          </table:table-cell>
          <table:table-cell office:value-type="float" office:value="6.67">
            <text:p>6.67</text:p>
          </table:table-cell>
          <table:table-cell office:value-type="float" office:value="7.50">
            <text:p>7.50</text:p>
          </table:table-cell>
          <table:table-cell office:value-type="float" office:value="4.00">
            <text:p>4.00</text:p>
          </table:table-cell>
          <table:table-cell office:value-type="float" office:value="18.17">
            <text:p>18.1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bastian</text:p>
          </table:table-cell>
          <table:table-cell office:value-type="string">
            <text:p>Hernandez Villamiz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bastianhernand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Fernando</text:p>
          </table:table-cell>
          <table:table-cell office:value-type="string">
            <text:p>Hernández Zuluag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f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Brayan Stiven</text:p>
          </table:table-cell>
          <table:table-cell office:value-type="string">
            <text:p>Herr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rreraska8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abio Andrés</text:p>
          </table:table-cell>
          <table:table-cell office:value-type="string">
            <text:p>Herr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biandre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nior Alejandro</text:p>
          </table:table-cell>
          <table:table-cell office:value-type="string">
            <text:p>Herrera Cardo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niorherrer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ISSON ALEXANDER</text:p>
          </table:table-cell>
          <table:table-cell office:value-type="string">
            <text:p>HERRERA GRACI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utanclan90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N ALEJANDRO</text:p>
          </table:table-cell>
          <table:table-cell office:value-type="string">
            <text:p>HERRERA GRACI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rreragracianoa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ison</text:p>
          </table:table-cell>
          <table:table-cell office:value-type="string">
            <text:p>Herrera Lop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fda@gmail.com</text:p>
          </table:table-cell>
          <table:table-cell office:value-type="float" office:value="9.83">
            <text:p>9.83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8.58">
            <text:p>18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MANUEL</text:p>
          </table:table-cell>
          <table:table-cell office:value-type="string">
            <text:p>HERRERA MAEST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maherrera@gmail.com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Neider Alexander</text:p>
          </table:table-cell>
          <table:table-cell office:value-type="string">
            <text:p>Herrera Marti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eidexanderher668@g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yhu</text:p>
          </table:table-cell>
          <table:table-cell office:value-type="string">
            <text:p>Herrera Pe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per.264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GAR MANUEL</text:p>
          </table:table-cell>
          <table:table-cell office:value-type="string">
            <text:p>HIGUI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iguitamanueledgar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Isabel Cristina</text:p>
          </table:table-cell>
          <table:table-cell office:value-type="string">
            <text:p>Higuita Bui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abelcristina1218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Esteban</text:p>
          </table:table-cell>
          <table:table-cell office:value-type="string">
            <text:p>Hincapié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estebanhincapie12@gmail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20.75">
            <text:p>20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hristian Eduardo</text:p>
          </table:table-cell>
          <table:table-cell office:value-type="string">
            <text:p>Hincapié Blandó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epalmdeira@gmail.com</text:p>
          </table:table-cell>
          <table:table-cell office:value-type="float" office:value="8.50">
            <text:p>8.5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3.50">
            <text:p>23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LYN LORENA</text:p>
          </table:table-cell>
          <table:table-cell office:value-type="string">
            <text:p>HINCAPIE ESTR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lori13_@hotmail.com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7.00">
            <text:p>17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ALBERTO</text:p>
          </table:table-cell>
          <table:table-cell office:value-type="string">
            <text:p>HINCAPIE RUI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zapatahincapie00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sus Antonio</text:p>
          </table:table-cell>
          <table:table-cell office:value-type="string">
            <text:p>Hinestro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susa@gmail.com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11.75">
            <text:p>11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rman David</text:p>
          </table:table-cell>
          <table:table-cell office:value-type="string">
            <text:p>Hinestro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ormanhinestroza@gmail.com</text:p>
          </table:table-cell>
          <table:table-cell office:value-type="float" office:value="9.00">
            <text:p>9.00</text:p>
          </table:table-cell>
          <table:table-cell office:value-type="float" office:value="7.50">
            <text:p>7.50</text:p>
          </table:table-cell>
          <table:table-cell office:value-type="float" office:value="4.00">
            <text:p>4.00</text:p>
          </table:table-cell>
          <table:table-cell office:value-type="float" office:value="20.50">
            <text:p>20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UBAN ARLEY</text:p>
          </table:table-cell>
          <table:table-cell office:value-type="string">
            <text:p>HIPIA ALV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dr@gmail.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tephania</text:p>
          </table:table-cell>
          <table:table-cell office:value-type="string">
            <text:p>Holguin Flo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tefaniah.28@hot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Brayan Esneyder</text:p>
          </table:table-cell>
          <table:table-cell office:value-type="string">
            <text:p>Holguin Monc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ayan1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GE ALBERTO</text:p>
          </table:table-cell>
          <table:table-cell office:value-type="string">
            <text:p>HOLGUIN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olazo133079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tephany</text:p>
          </table:table-cell>
          <table:table-cell office:value-type="string">
            <text:p>Holguín Zambr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ephany.holguinza09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JAVIER</text:p>
          </table:table-cell>
          <table:table-cell office:value-type="string">
            <text:p>HOYOS GOM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engocorre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EDARDO GABRIEL</text:p>
          </table:table-cell>
          <table:table-cell office:value-type="string">
            <text:p>HOYOS HERR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oyosherreramedardo@gmail.com</text:p>
          </table:table-cell>
          <table:table-cell office:value-type="float" office:value="9.67">
            <text:p>9.67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67">
            <text:p>22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ARRIZON STIVEN</text:p>
          </table:table-cell>
          <table:table-cell office:value-type="string">
            <text:p>HOYOS ORRE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uhxu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ge Luis</text:p>
          </table:table-cell>
          <table:table-cell office:value-type="string">
            <text:p>Hoyos Ya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rgelhy@gmail.com</text:p>
          </table:table-cell>
          <table:table-cell office:value-type="float" office:value="7.67">
            <text:p>7.67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0.42">
            <text:p>20.42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nder</text:p>
          </table:table-cell>
          <table:table-cell office:value-type="string">
            <text:p>Hurta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derhurtad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ALBERTO</text:p>
          </table:table-cell>
          <table:table-cell office:value-type="string">
            <text:p>HURTADO ARA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hurtado1967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Pablo</text:p>
          </table:table-cell>
          <table:table-cell office:value-type="string">
            <text:p>Hurtado Cor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nxsa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milo</text:p>
          </table:table-cell>
          <table:table-cell office:value-type="string">
            <text:p>Ibargu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miloibarguen02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uli Andrea</text:p>
          </table:table-cell>
          <table:table-cell office:value-type="string">
            <text:p>Iba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uliibarr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urladys</text:p>
          </table:table-cell>
          <table:table-cell office:value-type="string">
            <text:p>Ibarra Orti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urladys2004@gmail.com</text:p>
          </table:table-cell>
          <table:table-cell office:value-type="float" office:value="6.83">
            <text:p>6.83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18.58">
            <text:p>18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THA HELENA</text:p>
          </table:table-cell>
          <table:table-cell office:value-type="string">
            <text:p>ISAZA ALV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tha.isaza@firplak.com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7.00">
            <text:p>17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Esteban</text:p>
          </table:table-cell>
          <table:table-cell office:value-type="string">
            <text:p>Isaza Lop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on.isazalo@amigo.edu.co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jandro</text:p>
          </table:table-cell>
          <table:table-cell office:value-type="string">
            <text:p>Isaza Restre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andro.isaza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Isabel</text:p>
          </table:table-cell>
          <table:table-cell office:value-type="string">
            <text:p>Isaza Restre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abel.isaza@firplak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83">
            <text:p>19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CARLOS</text:p>
          </table:table-cell>
          <table:table-cell office:value-type="string">
            <text:p>ISAZA RESTRE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.isaza@firpla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ESLIE</text:p>
          </table:table-cell>
          <table:table-cell office:value-type="string">
            <text:p>JARAMILLO ALV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eslieja@gmail.com</text:p>
          </table:table-cell>
          <table:table-cell office:value-type="float" office:value="9.67">
            <text:p>9.67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67">
            <text:p>24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sid Moisés</text:p>
          </table:table-cell>
          <table:table-cell office:value-type="string">
            <text:p>Jaramillo Calderó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ramillocalderonyesid7319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BASTIAN</text:p>
          </table:table-cell>
          <table:table-cell office:value-type="string">
            <text:p>JARAMILLO CARDO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bascardo25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ISABEL CRISTINA</text:p>
          </table:table-cell>
          <table:table-cell office:value-type="string">
            <text:p>JARAMILLO CAST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ABEL.JARAMILLO@FIRPLAK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MILO</text:p>
          </table:table-cell>
          <table:table-cell office:value-type="string">
            <text:p>JARAMILLO COR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ficami150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BASTIAN</text:p>
          </table:table-cell>
          <table:table-cell office:value-type="string">
            <text:p>JARAMILLO DUQ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bastianduquejllo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HUA</text:p>
          </table:table-cell>
          <table:table-cell office:value-type="string">
            <text:p>JARAMILLO ESTR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hua12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Esteban</text:p>
          </table:table-cell>
          <table:table-cell office:value-type="string">
            <text:p>Jaramillo Marí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ej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vier Esteban</text:p>
          </table:table-cell>
          <table:table-cell office:value-type="string">
            <text:p>Jaramillo Maz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vieresteban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iguel Angel</text:p>
          </table:table-cell>
          <table:table-cell office:value-type="string">
            <text:p>Jaramillo Mora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guel.jaramillo73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bastián</text:p>
          </table:table-cell>
          <table:table-cell office:value-type="string">
            <text:p>Jaramillo Muri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bastianjaramillomuriel92@gmail.com</text:p>
          </table:table-cell>
          <table:table-cell office:value-type="float" office:value="8.50">
            <text:p>8.5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50">
            <text:p>18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exander</text:p>
          </table:table-cell>
          <table:table-cell office:value-type="string">
            <text:p>Jara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anderjarava@gmail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20.75">
            <text:p>20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anner</text:p>
          </table:table-cell>
          <table:table-cell office:value-type="string">
            <text:p>Jarava Contrer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nnerjc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Jime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f12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 Camilo</text:p>
          </table:table-cell>
          <table:table-cell office:value-type="string">
            <text:p>Jimé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cj@gmail.com</text:p>
          </table:table-cell>
          <table:table-cell office:value-type="float" office:value="9.67">
            <text:p>9.67</text:p>
          </table:table-cell>
          <table:table-cell office:value-type="float" office:value="8.75">
            <text:p>8.75</text:p>
          </table:table-cell>
          <table:table-cell office:value-type="float" office:value="5.00">
            <text:p>5.00</text:p>
          </table:table-cell>
          <table:table-cell office:value-type="float" office:value="23.42">
            <text:p>23.42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Jimé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elj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 Camila</text:p>
          </table:table-cell>
          <table:table-cell office:value-type="string">
            <text:p>Jimé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milajimenez8a@gmail.com</text:p>
          </table:table-cell>
          <table:table-cell office:value-type="float" office:value="9.83">
            <text:p>9.83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2.58">
            <text:p>22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icardo</text:p>
          </table:table-cell>
          <table:table-cell office:value-type="string">
            <text:p>Jimé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ickysibala28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XANDER</text:p>
          </table:table-cell>
          <table:table-cell office:value-type="string">
            <text:p>JIMÉNEZ BOT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botero0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 Alejandra</text:p>
          </table:table-cell>
          <table:table-cell office:value-type="string">
            <text:p>Jiménez Bus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a@gmail.com</text:p>
          </table:table-cell>
          <table:table-cell office:value-type="float" office:value="7.83">
            <text:p>7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7.83">
            <text:p>17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XANDER</text:p>
          </table:table-cell>
          <table:table-cell office:value-type="string">
            <text:p>JIMENEZ CARTAGE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jica09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war</text:p>
          </table:table-cell>
          <table:table-cell office:value-type="string">
            <text:p>Jiménez Garcí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mass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ILIANA MARIA</text:p>
          </table:table-cell>
          <table:table-cell office:value-type="string">
            <text:p>JIMENEZ GONZA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liji19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jhan</text:p>
          </table:table-cell>
          <table:table-cell office:value-type="string">
            <text:p>Jiménez Higui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imenezjhojhan9032017@gmail.com</text:p>
          </table:table-cell>
          <table:table-cell office:value-type="float" office:value="8.00">
            <text:p>8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6.75">
            <text:p>16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aren Dayana</text:p>
          </table:table-cell>
          <table:table-cell office:value-type="string">
            <text:p>Jiménez More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arend@gmail.com</text:p>
          </table:table-cell>
          <table:table-cell office:value-type="float" office:value="8.50">
            <text:p>8.50</text:p>
          </table:table-cell>
          <table:table-cell office:value-type="float" office:value="7.50">
            <text:p>7.50</text:p>
          </table:table-cell>
          <table:table-cell office:value-type="float" office:value="3.00">
            <text:p>3.00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 Alejandro</text:p>
          </table:table-cell>
          <table:table-cell office:value-type="string">
            <text:p>Jimenez Pena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o.202@hot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OSCAR JESUS</text:p>
          </table:table-cell>
          <table:table-cell office:value-type="string">
            <text:p>JULIO FAJAR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carjulif34@gmail.com</text:p>
          </table:table-cell>
          <table:table-cell office:value-type="float" office:value="7.67">
            <text:p>7.67</text:p>
          </table:table-cell>
          <table:table-cell office:value-type="float" office:value="10.00">
            <text:p>10.00</text:p>
          </table:table-cell>
          <table:table-cell office:value-type="float" office:value="2.00">
            <text:p>2.00</text:p>
          </table:table-cell>
          <table:table-cell office:value-type="float" office:value="19.67">
            <text:p>19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ECILIO</text:p>
          </table:table-cell>
          <table:table-cell office:value-type="string">
            <text:p>KLINGER CORDOB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ecilio12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DRA MILENA</text:p>
          </table:table-cell>
          <table:table-cell office:value-type="string">
            <text:p>KUAST PE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dra.kuast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a María</text:p>
          </table:table-cell>
          <table:table-cell office:value-type="string">
            <text:p>Lasprilla Loz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amarialasprillalozano@gmail.com</text:p>
          </table:table-cell>
          <table:table-cell office:value-type="float" office:value="8.00">
            <text:p>8.00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0.75">
            <text:p>20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ORENA ANDREA</text:p>
          </table:table-cell>
          <table:table-cell office:value-type="string">
            <text:p>LEAL HERR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renaleal_1308@hot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avid</text:p>
          </table:table-cell>
          <table:table-cell office:value-type="string">
            <text:p>Lem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davidlemus@gmail.com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2.00">
            <text:p>2.00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és Alexander</text:p>
          </table:table-cell>
          <table:table-cell office:value-type="string">
            <text:p>Lengua Gañ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lengua22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Javier</text:p>
          </table:table-cell>
          <table:table-cell office:value-type="string">
            <text:p>Leó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leocorrales0221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83">
            <text:p>24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gel Yesid</text:p>
          </table:table-cell>
          <table:table-cell office:value-type="string">
            <text:p>Leon Corra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gelye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DRA ASTRID</text:p>
          </table:table-cell>
          <table:table-cell office:value-type="string">
            <text:p>LEON SANCHEZ 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dra04839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PAOLA ANDREA</text:p>
          </table:table-cell>
          <table:table-cell office:value-type="string">
            <text:p>LE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briley386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UBEN</text:p>
          </table:table-cell>
          <table:table-cell office:value-type="string">
            <text:p>LEZCANO GONZA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ben.lg11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an Jose</text:p>
          </table:table-cell>
          <table:table-cell office:value-type="string">
            <text:p>Linares Mujic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anjose@gmail.com</text:p>
          </table:table-cell>
          <table:table-cell office:value-type="float" office:value="8.67">
            <text:p>8.67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1.67">
            <text:p>21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rley</text:p>
          </table:table-cell>
          <table:table-cell office:value-type="string">
            <text:p>Llano Cor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leyllano@gmail.com</text:p>
          </table:table-cell>
          <table:table-cell office:value-type="float" office:value="9.50">
            <text:p>9.5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50">
            <text:p>24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beiro</text:p>
          </table:table-cell>
          <table:table-cell office:value-type="string">
            <text:p>Loaiza 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nniferlodu5@gmail.com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Felipe</text:p>
          </table:table-cell>
          <table:table-cell office:value-type="string">
            <text:p>Loaiza giral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elix55girald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ira Alejandra</text:p>
          </table:table-cell>
          <table:table-cell office:value-type="string">
            <text:p>Loaiza Gonzá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iraq@gmail.com</text:p>
          </table:table-cell>
          <table:table-cell office:value-type="float" office:value="9.50">
            <text:p>9.5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8.25">
            <text:p>18.2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sus Alberto</text:p>
          </table:table-cell>
          <table:table-cell office:value-type="string">
            <text:p>Loaiza Lo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yis241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Loaiza Ospi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ipeloaizaospi7538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JANDRO</text:p>
          </table:table-cell>
          <table:table-cell office:value-type="string">
            <text:p>LONDO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andro.londono11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lian Steven</text:p>
          </table:table-cell>
          <table:table-cell office:value-type="string">
            <text:p>Londo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ianlondono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uben Alonso</text:p>
          </table:table-cell>
          <table:table-cell office:value-type="string">
            <text:p>londo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ben234@g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8.75">
            <text:p>18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LONDOÑO AGUDE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iago.londo.201599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ERSON ESTIVEN</text:p>
          </table:table-cell>
          <table:table-cell office:value-type="string">
            <text:p>LONDOÑO ALV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erson.londoño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 ALEJANDRA</text:p>
          </table:table-cell>
          <table:table-cell office:value-type="string">
            <text:p>LONDOÑO BED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a.londoño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Valentina</text:p>
          </table:table-cell>
          <table:table-cell office:value-type="string">
            <text:p>Londoño Bed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ndonovalen769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uvan Andres</text:p>
          </table:table-cell>
          <table:table-cell office:value-type="string">
            <text:p>Londoño Fran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duvan99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ESTEBAN</text:p>
          </table:table-cell>
          <table:table-cell office:value-type="string">
            <text:p>LONDOÑO FRAN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UYESUCASA@HOTMAIL.COM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LONDOÑO FRAN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iago191921@hot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xander</text:p>
          </table:table-cell>
          <table:table-cell office:value-type="string">
            <text:p>Londoño Galle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l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RIEL DE JESUS</text:p>
          </table:table-cell>
          <table:table-cell office:value-type="string">
            <text:p>LONDOÑO GONZA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ndonogonzalezariel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LIAN DAVID</text:p>
          </table:table-cell>
          <table:table-cell office:value-type="string">
            <text:p>LONDOÑO GRAN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ndonogranada0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AN BRANDON</text:p>
          </table:table-cell>
          <table:table-cell office:value-type="string">
            <text:p>LONDOÑO GUTIÉR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utierrezjhan73@gmail.com</text:p>
          </table:table-cell>
          <table:table-cell office:value-type="float" office:value="7.83">
            <text:p>7.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83">
            <text:p>7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AN ANDRES</text:p>
          </table:table-cell>
          <table:table-cell office:value-type="string">
            <text:p>LONDONO HERR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amirezarenas3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evin Alejandro</text:p>
          </table:table-cell>
          <table:table-cell office:value-type="string">
            <text:p>Londoño Muñ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vinalejandro123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Pablo</text:p>
          </table:table-cell>
          <table:table-cell office:value-type="string">
            <text:p>Londoño Ve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p@g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float" office:value="5.00">
            <text:p>5.00</text:p>
          </table:table-cell>
          <table:table-cell office:value-type="float" office:value="23.75">
            <text:p>23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STEFANIA</text:p>
          </table:table-cell>
          <table:table-cell office:value-type="string">
            <text:p>LONDOÑO V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ia12999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esfrancois</text:p>
          </table:table-cell>
          <table:table-cell office:value-type="string">
            <text:p>Lopera C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esfrancoi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 PAULINA</text:p>
          </table:table-cell>
          <table:table-cell office:value-type="string">
            <text:p>LOPERA PUER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ctoriamesa03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Nallely</text:p>
          </table:table-cell>
          <table:table-cell office:value-type="string">
            <text:p>Lopera Vás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llely123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Darío</text:p>
          </table:table-cell>
          <table:table-cell office:value-type="string">
            <text:p>Ló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d@gmail.com</text:p>
          </table:table-cell>
          <table:table-cell office:value-type="float" office:value="7.67">
            <text:p>7.67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0.67">
            <text:p>20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lvira de Jesús</text:p>
          </table:table-cell>
          <table:table-cell office:value-type="string">
            <text:p>Ló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vira@g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float" office:value="5.00">
            <text:p>5.00</text:p>
          </table:table-cell>
          <table:table-cell office:value-type="float" office:value="23.75">
            <text:p>23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NNY</text:p>
          </table:table-cell>
          <table:table-cell office:value-type="string">
            <text:p>LÓ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lopez376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Fernando</text:p>
          </table:table-cell>
          <table:table-cell office:value-type="string">
            <text:p>Lo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f@gmail.com</text:p>
          </table:table-cell>
          <table:table-cell office:value-type="float" office:value="8.50">
            <text:p>8.5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7.25">
            <text:p>17.2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Z ADRIANA</text:p>
          </table:table-cell>
          <table:table-cell office:value-type="string">
            <text:p>LOPEZ BETANC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drianalopezb1234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López Gonzá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ilo@gmai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ERSON</text:p>
          </table:table-cell>
          <table:table-cell office:value-type="string">
            <text:p>LOPEZ HERR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CORRE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N WAYNER</text:p>
          </table:table-cell>
          <table:table-cell office:value-type="string">
            <text:p>LÓPEZ HERR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hnwaynerlopez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erson</text:p>
          </table:table-cell>
          <table:table-cell office:value-type="string">
            <text:p>Lopez Moli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ersonlopezmolina59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Norbey Alejandro</text:p>
          </table:table-cell>
          <table:table-cell office:value-type="string">
            <text:p>Lopez Muñet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beylopez@gmail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20.75">
            <text:p>20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BRANDDON ESTID</text:p>
          </table:table-cell>
          <table:table-cell office:value-type="string">
            <text:p>LOPEZ OROZ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pezorozcobranddon39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ison</text:p>
          </table:table-cell>
          <table:table-cell office:value-type="string">
            <text:p>López Palaci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isonlo@gmail.com</text:p>
          </table:table-cell>
          <table:table-cell office:value-type="float" office:value="8.50">
            <text:p>8.5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20.25">
            <text:p>20.2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ERSON</text:p>
          </table:table-cell>
          <table:table-cell office:value-type="string">
            <text:p>LÓPEZ RU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rso042pt@hot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WARD IVÁN</text:p>
          </table:table-cell>
          <table:table-cell office:value-type="string">
            <text:p>LÓPEZ SALIN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wardlopezsalinas8@gmail.com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7.00">
            <text:p>17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lkin Alejandro</text:p>
          </table:table-cell>
          <table:table-cell office:value-type="string">
            <text:p>Lotero Usug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dasdjd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BRAHAM JOSE</text:p>
          </table:table-cell>
          <table:table-cell office:value-type="string">
            <text:p>LOZADA CARRAS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zadacarrascalabraham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83">
            <text:p>24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obinson</text:p>
          </table:table-cell>
          <table:table-cell office:value-type="string">
            <text:p>Lozano Bot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binson.lozano@gmai.com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12.00">
            <text:p>1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n Alexander</text:p>
          </table:table-cell>
          <table:table-cell office:value-type="string">
            <text:p>Lozano Chave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hna@gmail.com</text:p>
          </table:table-cell>
          <table:table-cell office:value-type="float" office:value="8.33">
            <text:p>8.33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1.33">
            <text:p>21.3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enied Antonio</text:p>
          </table:table-cell>
          <table:table-cell office:value-type="string">
            <text:p>Luc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fhsu@gmail.com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7.00">
            <text:p>17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ELLY MAIBELL</text:p>
          </table:table-cell>
          <table:table-cell office:value-type="string">
            <text:p>LUNA TULAN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ibelluna0916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EINEL JOSE</text:p>
          </table:table-cell>
          <table:table-cell office:value-type="string">
            <text:p>MACHA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ineljosemachado6487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RGIO ANDRES</text:p>
          </table:table-cell>
          <table:table-cell office:value-type="string">
            <text:p>MACHADO BARRIEN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chadobarrientossergio283@gmail.com</text:p>
          </table:table-cell>
          <table:table-cell office:value-type="float" office:value="8.67">
            <text:p>8.67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1.67">
            <text:p>21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 YOAN</text:p>
          </table:table-cell>
          <table:table-cell office:value-type="string">
            <text:p>MACHADO MUÑ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ik047@g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loria Emilse</text:p>
          </table:table-cell>
          <table:table-cell office:value-type="string">
            <text:p>Macias Bot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lomaciasbotero1985@hot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ICARDO</text:p>
          </table:table-cell>
          <table:table-cell office:value-type="string">
            <text:p>MACIAS FRAN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ik4rdo82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lio Cesar</text:p>
          </table:table-cell>
          <table:table-cell office:value-type="string">
            <text:p>Macías Quint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sdf@gmail.com</text:p>
          </table:table-cell>
          <table:table-cell office:value-type="float" office:value="8.67">
            <text:p>8.67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67">
            <text:p>18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LMAR ALONSO</text:p>
          </table:table-cell>
          <table:table-cell office:value-type="string">
            <text:p>MADRIG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drigalalonsowilmar@gmail.com</text:p>
          </table:table-cell>
          <table:table-cell office:value-type="float" office:value="6.83">
            <text:p>6.83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18.58">
            <text:p>18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ANTONIO</text:p>
          </table:table-cell>
          <table:table-cell office:value-type="string">
            <text:p>MALAVE CO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laveluisantonio342@gmail.com</text:p>
          </table:table-cell>
          <table:table-cell office:value-type="float" office:value="8.00">
            <text:p>8.00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0.75">
            <text:p>20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Maldonado Hurta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sal@g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ury</text:p>
          </table:table-cell>
          <table:table-cell office:value-type="string">
            <text:p>Mar Agu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mar.aguas@udea.edu.co</text:p>
          </table:table-cell>
          <table:table-cell office:value-type="float" office:value="8.83">
            <text:p>8.83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83">
            <text:p>22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avid</text:p>
          </table:table-cell>
          <table:table-cell office:value-type="string">
            <text:p>Marín Álv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marin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STEBAN ANDRES</text:p>
          </table:table-cell>
          <table:table-cell office:value-type="string">
            <text:p>MARIN CASTA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teban2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an Fernando</text:p>
          </table:table-cell>
          <table:table-cell office:value-type="string">
            <text:p>Marin Cata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6jhoanmari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yerly</text:p>
          </table:table-cell>
          <table:table-cell office:value-type="string">
            <text:p>Marín Gale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ye.1705@hot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ESTEBAN</text:p>
          </table:table-cell>
          <table:table-cell office:value-type="string">
            <text:p>MARIN GAÑ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maringa123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MILO ADOLFO</text:p>
          </table:table-cell>
          <table:table-cell office:value-type="string">
            <text:p>MARIN MEDI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milo.1194@hotmail.com</text:p>
          </table:table-cell>
          <table:table-cell office:value-type="float" office:value="8.67">
            <text:p>8.67</text:p>
          </table:table-cell>
          <table:table-cell office:value-type="float" office:value="6.25">
            <text:p>6.25</text:p>
          </table:table-cell>
          <table:table-cell office:value-type="float" office:value="4.00">
            <text:p>4.00</text:p>
          </table:table-cell>
          <table:table-cell office:value-type="float" office:value="18.92">
            <text:p>18.92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an Alejandro</text:p>
          </table:table-cell>
          <table:table-cell office:value-type="string">
            <text:p>Marin Quir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ercial@firpla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rlos</text:p>
          </table:table-cell>
          <table:table-cell office:value-type="string">
            <text:p>Marín Valen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tc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UIN DE JESUS</text:p>
          </table:table-cell>
          <table:table-cell office:value-type="string">
            <text:p>MARQUEZ MENDO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uim2005@gmail.com</text:p>
          </table:table-cell>
          <table:table-cell office:value-type="float" office:value="8.83">
            <text:p>8.83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3.83">
            <text:p>23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xander</text:p>
          </table:table-cell>
          <table:table-cell office:value-type="string">
            <text:p>Marti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maas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Gustavo</text:p>
          </table:table-cell>
          <table:table-cell office:value-type="string">
            <text:p>Martí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g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Sebastián</text:p>
          </table:table-cell>
          <table:table-cell office:value-type="string">
            <text:p>Martí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se@gmail.com</text:p>
          </table:table-cell>
          <table:table-cell office:value-type="float" office:value="8.67">
            <text:p>8.67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1.42">
            <text:p>21.42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Carlos</text:p>
          </table:table-cell>
          <table:table-cell office:value-type="string">
            <text:p>Martí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ghkl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rlos</text:p>
          </table:table-cell>
          <table:table-cell office:value-type="string">
            <text:p>Martinez Algar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c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1.00">
            <text:p>21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NELSON ENRIQUE</text:p>
          </table:table-cell>
          <table:table-cell office:value-type="string">
            <text:p>MARTINEZ ARROY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tinezarroyo314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HERMIN</text:p>
          </table:table-cell>
          <table:table-cell office:value-type="string">
            <text:p>MARTINEZ BERR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tinezberrioher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BASTIAN</text:p>
          </table:table-cell>
          <table:table-cell office:value-type="string">
            <text:p>MARTÍNEZ BETANCU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bastian.martinez@firpla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nior Alfonso</text:p>
          </table:table-cell>
          <table:table-cell office:value-type="string">
            <text:p>Martinez Casta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df@gmail.com</text:p>
          </table:table-cell>
          <table:table-cell office:value-type="float" office:value="8.67">
            <text:p>8.67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67">
            <text:p>18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sus Rafael</text:p>
          </table:table-cell>
          <table:table-cell office:value-type="string">
            <text:p>Martínez del Pra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lpradojesus987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SUS DAVID</text:p>
          </table:table-cell>
          <table:table-cell office:value-type="string">
            <text:p>MARTINEZ GAZAB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tinezgazabonjesus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83">
            <text:p>24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lian Antonio</text:p>
          </table:table-cell>
          <table:table-cell office:value-type="string">
            <text:p>Martinez Herr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lian.martinez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ESAR NEY</text:p>
          </table:table-cell>
          <table:table-cell office:value-type="string">
            <text:p>MARTINEZ LO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loriaar30@gmail.com</text:p>
          </table:table-cell>
          <table:table-cell office:value-type="float" office:value="9.00">
            <text:p>9.0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16.50">
            <text:p>16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oibe</text:p>
          </table:table-cell>
          <table:table-cell office:value-type="string">
            <text:p>Martinez Marti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iber.martinez@firpla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MILO</text:p>
          </table:table-cell>
          <table:table-cell office:value-type="string">
            <text:p>MARTINEZ MONT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m0506037@gmail.com</text:p>
          </table:table-cell>
          <table:table-cell office:value-type="float" office:value="8.00">
            <text:p>8.00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0.75">
            <text:p>20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NATALIA</text:p>
          </table:table-cell>
          <table:table-cell office:value-type="string">
            <text:p>MARTINEZ OREJUE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m1240507@gmail.com</text:p>
          </table:table-cell>
          <table:table-cell office:value-type="float" office:value="8.33">
            <text:p>8.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33">
            <text:p>8.3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M FERNEY</text:p>
          </table:table-cell>
          <table:table-cell office:value-type="string">
            <text:p>MARTÍNEZ ORTÍ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o8312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AN CARLOS</text:p>
          </table:table-cell>
          <table:table-cell office:value-type="string">
            <text:p>MARTINEZ PEÑA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ancarlos19940107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UILLERMO ANTONIO</text:p>
          </table:table-cell>
          <table:table-cell office:value-type="string">
            <text:p>MARTINEZ PIC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CORREE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TIVEN</text:p>
          </table:table-cell>
          <table:table-cell office:value-type="string">
            <text:p>MARTINEZ PINE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tinezpinedastiven@gmail.com</text:p>
          </table:table-cell>
          <table:table-cell office:value-type="float" office:value="5.67">
            <text:p>5.67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17.42">
            <text:p>17.42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AVID</text:p>
          </table:table-cell>
          <table:table-cell office:value-type="string">
            <text:p>MARTINEZ ROJ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16samuel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FERNANDO</text:p>
          </table:table-cell>
          <table:table-cell office:value-type="string">
            <text:p>MARTINEZ SEPULVE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martinezs6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driana</text:p>
          </table:table-cell>
          <table:table-cell office:value-type="string">
            <text:p>Martinez Ve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LEZATEHORTUA8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rica Isabel</text:p>
          </table:table-cell>
          <table:table-cell office:value-type="string">
            <text:p>Marulanda Bece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rica.marulanda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erson Felipe</text:p>
          </table:table-cell>
          <table:table-cell office:value-type="string">
            <text:p>Marulanda Giral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ersonf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jandro</text:p>
          </table:table-cell>
          <table:table-cell office:value-type="string">
            <text:p>Masapan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idrotdf@hotmail.es</text:p>
          </table:table-cell>
          <table:table-cell office:value-type="float" office:value="7.00">
            <text:p>7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5.75">
            <text:p>15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lver</text:p>
          </table:table-cell>
          <table:table-cell office:value-type="string">
            <text:p>Mauricio Chavarrí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vermaurici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ny Alexander</text:p>
          </table:table-cell>
          <table:table-cell office:value-type="string">
            <text:p>Maya Herná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ny.maya.hernand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bert Camilo</text:p>
          </table:table-cell>
          <table:table-cell office:value-type="string">
            <text:p>Maya Su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naruedarestrepo@hotmail.com</text:p>
          </table:table-cell>
          <table:table-cell office:value-type="float" office:value="7.67">
            <text:p>7.67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7.67">
            <text:p>17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n Fredy</text:p>
          </table:table-cell>
          <table:table-cell office:value-type="string">
            <text:p>Mazo Velás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ircuitox3@yahoo.es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USTAVO ELIAS</text:p>
          </table:table-cell>
          <table:table-cell office:value-type="string">
            <text:p>MAZZIRI LOZ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ustavoeliasmazziri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Oscar Hernando</text:p>
          </table:table-cell>
          <table:table-cell office:value-type="string">
            <text:p>Medi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carhernando@gmail.com</text:p>
          </table:table-cell>
          <table:table-cell office:value-type="float" office:value="6.00">
            <text:p>6.00</text:p>
          </table:table-cell>
          <table:table-cell office:value-type="float" office:value="7.50">
            <text:p>7.50</text:p>
          </table:table-cell>
          <table:table-cell office:value-type="float" office:value="5.00">
            <text:p>5.00</text:p>
          </table:table-cell>
          <table:table-cell office:value-type="float" office:value="18.50">
            <text:p>18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LEYTER</text:p>
          </table:table-cell>
          <table:table-cell office:value-type="string">
            <text:p>MEDINA CERP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ytermedinac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avid</text:p>
          </table:table-cell>
          <table:table-cell office:value-type="string">
            <text:p>Medina Maz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medina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bnerson</text:p>
          </table:table-cell>
          <table:table-cell office:value-type="string">
            <text:p>Medina Quej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bnerdonmedina@gmail.com</text:p>
          </table:table-cell>
          <table:table-cell office:value-type="float" office:value="9.50">
            <text:p>9.5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50">
            <text:p>23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 ANDRES</text:p>
          </table:table-cell>
          <table:table-cell office:value-type="string">
            <text:p>MEJIA DIA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andres@gmail.com</text:p>
          </table:table-cell>
          <table:table-cell office:value-type="float" office:value="8.83">
            <text:p>8.83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20.58">
            <text:p>20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ICHAEL</text:p>
          </table:table-cell>
          <table:table-cell office:value-type="string">
            <text:p>MEJIA HERNA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ccasidy18@g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8.75">
            <text:p>18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Alexander</text:p>
          </table:table-cell>
          <table:table-cell office:value-type="string">
            <text:p>Mejia Mun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onalexandermejiamunera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Hailer Smit</text:p>
          </table:table-cell>
          <table:table-cell office:value-type="string">
            <text:p>Mejia Restre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ilermejia5@gmail.com</text:p>
          </table:table-cell>
          <table:table-cell office:value-type="float" office:value="6.67">
            <text:p>6.67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6.67">
            <text:p>16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afael</text:p>
          </table:table-cell>
          <table:table-cell office:value-type="string">
            <text:p>Mejía Roj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rt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GE IVAN</text:p>
          </table:table-cell>
          <table:table-cell office:value-type="string">
            <text:p>MEJIA SALDARRIAG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rgeivanmejiasaldarriaga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UBERNEY</text:p>
          </table:table-cell>
          <table:table-cell office:value-type="string">
            <text:p>MEJIA VERGA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jiavergarad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OSMIR ADRIAN</text:p>
          </table:table-cell>
          <table:table-cell office:value-type="string">
            <text:p>MEJIAS TORREALB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ta11169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OSNAR ALBERTO</text:p>
          </table:table-cell>
          <table:table-cell office:value-type="string">
            <text:p>MEJIAS TORREALB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xnartorrealba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rlyn Alejandra</text:p>
          </table:table-cell>
          <table:table-cell office:value-type="string">
            <text:p>Melchor Osor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rlynosorio5432@gmail.com</text:p>
          </table:table-cell>
          <table:table-cell office:value-type="float" office:value="8.67">
            <text:p>8.67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3.67">
            <text:p>23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ANIER ALEXANDER</text:p>
          </table:table-cell>
          <table:table-cell office:value-type="string">
            <text:p>ME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aniermena839@gmail.com</text:p>
          </table:table-cell>
          <table:table-cell office:value-type="float" office:value="7.17">
            <text:p>7.17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0.17">
            <text:p>20.1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Brayan</text:p>
          </table:table-cell>
          <table:table-cell office:value-type="string">
            <text:p>Mena Arp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yjyhu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VID ANDRES</text:p>
          </table:table-cell>
          <table:table-cell office:value-type="string">
            <text:p>MENA MOSQU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zatorugoll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ego Andrés</text:p>
          </table:table-cell>
          <table:table-cell office:value-type="string">
            <text:p>Me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gom12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men Elena</text:p>
          </table:table-cell>
          <table:table-cell office:value-type="string">
            <text:p>Mendo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men.mayo201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WIN JOSE</text:p>
          </table:table-cell>
          <table:table-cell office:value-type="string">
            <text:p>MENDOZA BLAN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winjmb@hotmail.com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Harrinson</text:p>
          </table:table-cell>
          <table:table-cell office:value-type="string">
            <text:p>Mendoza Herna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mendoza93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ilfredo</text:p>
          </table:table-cell>
          <table:table-cell office:value-type="string">
            <text:p>Mercado Gutier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ilfredomg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PAOLA ANDREA</text:p>
          </table:table-cell>
          <table:table-cell office:value-type="string">
            <text:p>MERCADO HERNA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mahraluisapedroluisamore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avid</text:p>
          </table:table-cell>
          <table:table-cell office:value-type="string">
            <text:p>Mesa Herr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egistra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ison Arley</text:p>
          </table:table-cell>
          <table:table-cell office:value-type="string">
            <text:p>Mesa Maz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imesa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ERSON</text:p>
          </table:table-cell>
          <table:table-cell office:value-type="string">
            <text:p>MESA MONSAL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samonsalveanderson31134@g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uván Andrés</text:p>
          </table:table-cell>
          <table:table-cell office:value-type="string">
            <text:p>Mesa Monsal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samonsalveduvanandres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lio César</text:p>
          </table:table-cell>
          <table:table-cell office:value-type="string">
            <text:p>Mesa Ocam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liocesar.2893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RESBEY</text:p>
          </table:table-cell>
          <table:table-cell office:value-type="string">
            <text:p>MESA PI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resbey.mesa@firplak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ustavo Alveiro</text:p>
          </table:table-cell>
          <table:table-cell office:value-type="string">
            <text:p>Mesa Ri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usmesari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JOSE</text:p>
          </table:table-cell>
          <table:table-cell office:value-type="string">
            <text:p>MIER RODRI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.mier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iego</text:p>
          </table:table-cell>
          <table:table-cell office:value-type="string">
            <text:p>Misas C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di1122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GE ELIAS</text:p>
          </table:table-cell>
          <table:table-cell office:value-type="string">
            <text:p>MOLI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rge.molina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BASTIAN</text:p>
          </table:table-cell>
          <table:table-cell office:value-type="string">
            <text:p>MOLINA C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ito_9984@hot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rley Gabriel</text:p>
          </table:table-cell>
          <table:table-cell office:value-type="string">
            <text:p>Molina Isa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briel.molina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z Danery</text:p>
          </table:table-cell>
          <table:table-cell office:value-type="string">
            <text:p>Molina Orti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zdanerymolina2316@g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NICOLAS ALBERTO</text:p>
          </table:table-cell>
          <table:table-cell office:value-type="string">
            <text:p>MOLINA QUINT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icomolina1966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LMAR ANDRES</text:p>
          </table:table-cell>
          <table:table-cell office:value-type="string">
            <text:p>MOLINA RESTRE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marmolinar2134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ubian</text:p>
          </table:table-cell>
          <table:table-cell office:value-type="string">
            <text:p>Molina Roj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ubianmr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rgio Vianey</text:p>
          </table:table-cell>
          <table:table-cell office:value-type="string">
            <text:p>Molina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vms593@gmail.com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NUELA</text:p>
          </table:table-cell>
          <table:table-cell office:value-type="string">
            <text:p>MONCADA VELAS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uela.moncada@firplak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NORLDALIS</text:p>
          </table:table-cell>
          <table:table-cell office:value-type="string">
            <text:p>MONDRAGON SIE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dalismondragon12@gamil.com</text:p>
          </table:table-cell>
          <table:table-cell office:value-type="float" office:value="8.83">
            <text:p>8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83">
            <text:p>18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ge Hugo</text:p>
          </table:table-cell>
          <table:table-cell office:value-type="string">
            <text:p>Monsal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rge-monsalve@outloo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aren</text:p>
          </table:table-cell>
          <table:table-cell office:value-type="string">
            <text:p>Monsal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arenmonsalve2099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</text:p>
          </table:table-cell>
          <table:table-cell office:value-type="string">
            <text:p>Monsalve Aristizáb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dfg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 ALEXIS</text:p>
          </table:table-cell>
          <table:table-cell office:value-type="string">
            <text:p>MONSALVE CARDO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1monsalve@hot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MONSALVE COR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ymonsa1505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evin Alonso</text:p>
          </table:table-cell>
          <table:table-cell office:value-type="string">
            <text:p>Monsalve Giral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vinmonsalve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1.00">
            <text:p>21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FERSON</text:p>
          </table:table-cell>
          <table:table-cell office:value-type="string">
            <text:p>MONSALVE TABA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kklj@gmail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7.75">
            <text:p>17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MON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montes@gmail.com</text:p>
          </table:table-cell>
          <table:table-cell office:value-type="float" office:value="7.83">
            <text:p>7.83</text:p>
          </table:table-cell>
          <table:table-cell office:value-type="float" office:value="7.50">
            <text:p>7.50</text:p>
          </table:table-cell>
          <table:table-cell office:value-type="float" office:value="5.00">
            <text:p>5.00</text:p>
          </table:table-cell>
          <table:table-cell office:value-type="float" office:value="20.33">
            <text:p>20.3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ge Andrés</text:p>
          </table:table-cell>
          <table:table-cell office:value-type="string">
            <text:p>Montesi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rgea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rlos</text:p>
          </table:table-cell>
          <table:table-cell office:value-type="string">
            <text:p>Mont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cm@gmail.com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Esteban</text:p>
          </table:table-cell>
          <table:table-cell office:value-type="string">
            <text:p>Mont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esteban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NATALIA</text:p>
          </table:table-cell>
          <table:table-cell office:value-type="string">
            <text:p>MONT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tymontoya83@hotmail.com</text:p>
          </table:table-cell>
          <table:table-cell office:value-type="float" office:value="9.50">
            <text:p>9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50">
            <text:p>9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 CAMILO</text:p>
          </table:table-cell>
          <table:table-cell office:value-type="string">
            <text:p>MONTOYA AGUDE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montoyaagudelo@gmail.com</text:p>
          </table:table-cell>
          <table:table-cell office:value-type="float" office:value="8.83">
            <text:p>8.83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1.83">
            <text:p>21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MONTOYA ARBOLE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ipemontoyaa2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N MARIO</text:p>
          </table:table-cell>
          <table:table-cell office:value-type="string">
            <text:p>MONTOYA ARI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o-725@hotmail.com</text:p>
          </table:table-cell>
          <table:table-cell office:value-type="float" office:value="7.83">
            <text:p>7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7.83">
            <text:p>17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PABLO</text:p>
          </table:table-cell>
          <table:table-cell office:value-type="string">
            <text:p>MONTOYA C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toyacanojuan3462@gmail.com</text:p>
          </table:table-cell>
          <table:table-cell office:value-type="float" office:value="7.00">
            <text:p>7.00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19.75">
            <text:p>19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ison</text:p>
          </table:table-cell>
          <table:table-cell office:value-type="string">
            <text:p>Montoya Cor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isonfinc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GE LUIS</text:p>
          </table:table-cell>
          <table:table-cell office:value-type="string">
            <text:p>MONTOYA COR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rgeluismontoyacorrea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steban</text:p>
          </table:table-cell>
          <table:table-cell office:value-type="string">
            <text:p>Montoya Dio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mondsrv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Alberto</text:p>
          </table:table-cell>
          <table:table-cell office:value-type="string">
            <text:p>Montoya Espino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nnert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JANDRO</text:p>
          </table:table-cell>
          <table:table-cell office:value-type="string">
            <text:p>MONTOYA GIRAL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andromontogir@gmail.com</text:p>
          </table:table-cell>
          <table:table-cell office:value-type="float" office:value="8.83">
            <text:p>8.83</text:p>
          </table:table-cell>
          <table:table-cell office:value-type="float" office:value="8.75">
            <text:p>8.75</text:p>
          </table:table-cell>
          <table:table-cell office:value-type="float" office:value="5.00">
            <text:p>5.00</text:p>
          </table:table-cell>
          <table:table-cell office:value-type="float" office:value="22.58">
            <text:p>22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ANNA ANDREA</text:p>
          </table:table-cell>
          <table:table-cell office:value-type="string">
            <text:p>MONTOYA ISA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hannaisaza2056@gmail.com</text:p>
          </table:table-cell>
          <table:table-cell office:value-type="float" office:value="9.83">
            <text:p>9.83</text:p>
          </table:table-cell>
          <table:table-cell office:value-type="float" office:value="7.50">
            <text:p>7.50</text:p>
          </table:table-cell>
          <table:table-cell office:value-type="float" office:value="4.00">
            <text:p>4.00</text:p>
          </table:table-cell>
          <table:table-cell office:value-type="float" office:value="21.33">
            <text:p>21.3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AVID</text:p>
          </table:table-cell>
          <table:table-cell office:value-type="string">
            <text:p>MONTOYA PELA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damontoya47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na</text:p>
          </table:table-cell>
          <table:table-cell office:value-type="string">
            <text:p>Montoya Rí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ana01.08@outlook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Pablo</text:p>
          </table:table-cell>
          <table:table-cell office:value-type="string">
            <text:p>Montoya Roble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montoyar@eafit.edu.co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dra Patricia</text:p>
          </table:table-cell>
          <table:table-cell office:value-type="string">
            <text:p>Montoya Valen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dramontoya802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ANDRES</text:p>
          </table:table-cell>
          <table:table-cell office:value-type="string">
            <text:p>MONTOYA VARG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montoya1426@gmail.com</text:p>
          </table:table-cell>
          <table:table-cell office:value-type="float" office:value="7.33">
            <text:p>7.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33">
            <text:p>7.3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IGUEL ANGEL</text:p>
          </table:table-cell>
          <table:table-cell office:value-type="string">
            <text:p>MONTOYA VELAS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guelmontoya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Orlando de Jesús</text:p>
          </table:table-cell>
          <table:table-cell office:value-type="string">
            <text:p>Mo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landomor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XANDER DE JESUS</text:p>
          </table:table-cell>
          <table:table-cell office:value-type="string">
            <text:p>MORA ALEXAND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anderdejesus16@hotmail.com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MILO</text:p>
          </table:table-cell>
          <table:table-cell office:value-type="string">
            <text:p>MORA JIMÉ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camilomora0125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USANA</text:p>
          </table:table-cell>
          <table:table-cell office:value-type="string">
            <text:p>MORA MONC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sanamoram029@gmail.com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JOSE</text:p>
          </table:table-cell>
          <table:table-cell office:value-type="string">
            <text:p>MORA RUI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jomorarui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GE ORLANDO</text:p>
          </table:table-cell>
          <table:table-cell office:value-type="string">
            <text:p>MORA VANEG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mora@hot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uard Alexander</text:p>
          </table:table-cell>
          <table:table-cell office:value-type="string">
            <text:p>Mora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uara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ALEXANDER</text:p>
          </table:table-cell>
          <table:table-cell office:value-type="string">
            <text:p>MORA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onalexandermorale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bastián</text:p>
          </table:table-cell>
          <table:table-cell office:value-type="string">
            <text:p>Morales Fló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.m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ana</text:p>
          </table:table-cell>
          <table:table-cell office:value-type="string">
            <text:p>Morales Guzm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ralesguzmandian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Cristobal</text:p>
          </table:table-cell>
          <table:table-cell office:value-type="string">
            <text:p>Morales Pad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c@gmail.com</text:p>
          </table:table-cell>
          <table:table-cell office:value-type="float" office:value="8.83">
            <text:p>8.83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20.58">
            <text:p>20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INSON</text:p>
          </table:table-cell>
          <table:table-cell office:value-type="string">
            <text:p>MORALES TORRE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insonjaviermoralestorreyes@g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21.75">
            <text:p>21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 Camilo</text:p>
          </table:table-cell>
          <table:table-cell office:value-type="string">
            <text:p>More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an1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HAROL ESTIVEN</text:p>
          </table:table-cell>
          <table:table-cell office:value-type="string">
            <text:p>MORE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rolmoreno2734@gmail.com</text:p>
          </table:table-cell>
          <table:table-cell office:value-type="float" office:value="7.50">
            <text:p>7.5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2.50">
            <text:p>22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an Carlos</text:p>
          </table:table-cell>
          <table:table-cell office:value-type="string">
            <text:p>More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ancarlosmocca@gmail.com</text:p>
          </table:table-cell>
          <table:table-cell office:value-type="float" office:value="7.83">
            <text:p>7.83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0.83">
            <text:p>20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Emilio</text:p>
          </table:table-cell>
          <table:table-cell office:value-type="string">
            <text:p>Moreno Arell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ucionestecnicasle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JAIRO</text:p>
          </table:table-cell>
          <table:table-cell office:value-type="string">
            <text:p>MORENO ESCAND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renoescandonjhonjairo@gmail.com</text:p>
          </table:table-cell>
          <table:table-cell office:value-type="float" office:value="7.67">
            <text:p>7.67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1.67">
            <text:p>21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Norela</text:p>
          </table:table-cell>
          <table:table-cell office:value-type="string">
            <text:p>Moreno Estr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elamoreno1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AVID</text:p>
          </table:table-cell>
          <table:table-cell office:value-type="string">
            <text:p>MORENO PALAC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renopalaciojuan6372@gmail.com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AMID</text:p>
          </table:table-cell>
          <table:table-cell office:value-type="string">
            <text:p>MORENO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amid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AN ESTEBAN</text:p>
          </table:table-cell>
          <table:table-cell office:value-type="string">
            <text:p>MORENO VALEN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NEY1027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ssica</text:p>
          </table:table-cell>
          <table:table-cell office:value-type="string">
            <text:p>Moriano Corté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ssica_cortes2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ustavo Adolfo</text:p>
          </table:table-cell>
          <table:table-cell office:value-type="string">
            <text:p>Mosqu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avo2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avid</text:p>
          </table:table-cell>
          <table:table-cell office:value-type="string">
            <text:p>Mosqu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dm@gmail.com</text:p>
          </table:table-cell>
          <table:table-cell office:value-type="float" office:value="9.50">
            <text:p>9.5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50">
            <text:p>24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ESTEBAN</text:p>
          </table:table-cell>
          <table:table-cell office:value-type="string">
            <text:p>MOSQU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estebanmosquera874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Jair</text:p>
          </table:table-cell>
          <table:table-cell office:value-type="string">
            <text:p>Mosquera Hurta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jair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VID SANTIAGO</text:p>
          </table:table-cell>
          <table:table-cell office:value-type="string">
            <text:p>MOSQUERA LONG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VID.LONGA@HOTMAIL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7.75">
            <text:p>17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UVAN MATEO</text:p>
          </table:table-cell>
          <table:table-cell office:value-type="string">
            <text:p>MOSQUERA MORE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uvan121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INER</text:p>
          </table:table-cell>
          <table:table-cell office:value-type="string">
            <text:p>MOSQUERA MOSQU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squeramosqueraeiner@g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21.75">
            <text:p>21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GE EDISON</text:p>
          </table:table-cell>
          <table:table-cell office:value-type="string">
            <text:p>MOSQUERA MOSQU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insonmaturana@icloud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ston Antonio</text:p>
          </table:table-cell>
          <table:table-cell office:value-type="string">
            <text:p>Mosquera Mosqu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stonaa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RLEY JAIR</text:p>
          </table:table-cell>
          <table:table-cell office:value-type="string">
            <text:p>MOSQUERA MUR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leyjair1993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AN SEBASTIAN</text:p>
          </table:table-cell>
          <table:table-cell office:value-type="string">
            <text:p>MOSQUERA PALACI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oansebastin7183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 Camilo</text:p>
          </table:table-cell>
          <table:table-cell office:value-type="string">
            <text:p>M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moya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Victor</text:p>
          </table:table-cell>
          <table:table-cell office:value-type="string">
            <text:p>Mun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ctor.munera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VID ALBERTO</text:p>
          </table:table-cell>
          <table:table-cell office:value-type="string">
            <text:p>MUNERA MAR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vidmunera2016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LSON</text:p>
          </table:table-cell>
          <table:table-cell office:value-type="string">
            <text:p>MUNERA PINE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sondprotesis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Carlos</text:p>
          </table:table-cell>
          <table:table-cell office:value-type="string">
            <text:p>Munera Quint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lichemunera2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MAURO</text:p>
          </table:table-cell>
          <table:table-cell office:value-type="string">
            <text:p>MUÑ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maurom2384@gmail.com</text:p>
          </table:table-cell>
          <table:table-cell office:value-type="float" office:value="9.83">
            <text:p>9.83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8.58">
            <text:p>18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uvan Alexis</text:p>
          </table:table-cell>
          <table:table-cell office:value-type="string">
            <text:p>Muñ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uvan123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rlos</text:p>
          </table:table-cell>
          <table:table-cell office:value-type="string">
            <text:p>Muñoz Bed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bedoya1990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LLY</text:p>
          </table:table-cell>
          <table:table-cell office:value-type="string">
            <text:p>MUÑOZ COLMENA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lymucol3443@gmail.com</text:p>
          </table:table-cell>
          <table:table-cell office:value-type="float" office:value="9.50">
            <text:p>9.5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50">
            <text:p>23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frain</text:p>
          </table:table-cell>
          <table:table-cell office:value-type="string">
            <text:p>Muñoz Fran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fram@gmail.com</text:p>
          </table:table-cell>
          <table:table-cell office:value-type="float" office:value="8.83">
            <text:p>8.83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1.83">
            <text:p>21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steban</text:p>
          </table:table-cell>
          <table:table-cell office:value-type="string">
            <text:p>Muñoz Garcí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teban8356m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VICTOR HUGO</text:p>
          </table:table-cell>
          <table:table-cell office:value-type="string">
            <text:p>MUÑOZ GAR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M196390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imar</text:p>
          </table:table-cell>
          <table:table-cell office:value-type="string">
            <text:p>Muñoz Mendo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imar23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Fernando</text:p>
          </table:table-cell>
          <table:table-cell office:value-type="string">
            <text:p>Muñoz Mo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@gmail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7.75">
            <text:p>17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vinson</text:p>
          </table:table-cell>
          <table:table-cell office:value-type="string">
            <text:p>Muñoz Muñ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perdavinson@outlook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7.75">
            <text:p>17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TEO</text:p>
          </table:table-cell>
          <table:table-cell office:value-type="string">
            <text:p>MUÑOZ MUÑ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unozmateo7492@g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21.75">
            <text:p>21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ISON ESTIVEN</text:p>
          </table:table-cell>
          <table:table-cell office:value-type="string">
            <text:p>MUÑOZ SARRASO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jvico03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liana</text:p>
          </table:table-cell>
          <table:table-cell office:value-type="string">
            <text:p>Muñoz Vas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liana-mu-oz1@hot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Oscar David</text:p>
          </table:table-cell>
          <table:table-cell office:value-type="string">
            <text:p>Muñoz Vás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ndofer@gmail.com</text:p>
          </table:table-cell>
          <table:table-cell office:value-type="float" office:value="8.00">
            <text:p>8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6.75">
            <text:p>16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ANA MARCELA</text:p>
          </table:table-cell>
          <table:table-cell office:value-type="string">
            <text:p>MUÑOZ VE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celamv25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ana Marcela</text:p>
          </table:table-cell>
          <table:table-cell office:value-type="string">
            <text:p>Muñoz V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gdb109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a Carolina</text:p>
          </table:table-cell>
          <table:table-cell office:value-type="string">
            <text:p>Mur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aromurcia@g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float" office:value="5.00">
            <text:p>5.00</text:p>
          </table:table-cell>
          <table:table-cell office:value-type="float" office:value="23.75">
            <text:p>23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n Sebastián</text:p>
          </table:table-cell>
          <table:table-cell office:value-type="string">
            <text:p>Muriel Bermú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muriel999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LON ANDRES</text:p>
          </table:table-cell>
          <table:table-cell office:value-type="string">
            <text:p>MURIEL MUÑ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lonmuriel7254@gmail.com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7.00">
            <text:p>17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EVIN ALBERTO</text:p>
          </table:table-cell>
          <table:table-cell office:value-type="string">
            <text:p>MURILLO IBA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vin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iry</text:p>
          </table:table-cell>
          <table:table-cell office:value-type="string">
            <text:p>Murillo Mosqu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iry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a Lilia</text:p>
          </table:table-cell>
          <table:table-cell office:value-type="string">
            <text:p>Naranj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a.naranjo@firpla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</text:p>
          </table:table-cell>
          <table:table-cell office:value-type="string">
            <text:p>Naranjo Oroz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nara2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uardo</text:p>
          </table:table-cell>
          <table:table-cell office:value-type="string">
            <text:p>Narvaez Ari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uardo.narvaez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MAURICIO</text:p>
          </table:table-cell>
          <table:table-cell office:value-type="string">
            <text:p>NARVAEZ ECHEVER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rvaezcorazonloc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FERSON</text:p>
          </table:table-cell>
          <table:table-cell office:value-type="string">
            <text:p>NAVA MARTI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fer2004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DANIEL</text:p>
          </table:table-cell>
          <table:table-cell office:value-type="string">
            <text:p>NAVARRO DELGA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navarrojd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Alfredo</text:p>
          </table:table-cell>
          <table:table-cell office:value-type="string">
            <text:p>Nav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sqwer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bastian</text:p>
          </table:table-cell>
          <table:table-cell office:value-type="string">
            <text:p>Nav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bastiannavas@gmail.com</text:p>
          </table:table-cell>
          <table:table-cell office:value-type="float" office:value="8.00">
            <text:p>8.0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19.75">
            <text:p>19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 EDUARDO</text:p>
          </table:table-cell>
          <table:table-cell office:value-type="string">
            <text:p>NEGRETE LEV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egretedaniel8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Camilo</text:p>
          </table:table-cell>
          <table:table-cell office:value-type="string">
            <text:p>Nuñ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cami8924@gmail.com</text:p>
          </table:table-cell>
          <table:table-cell office:value-type="float" office:value="8.00">
            <text:p>8.00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0.75">
            <text:p>20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VANY ALBERTO</text:p>
          </table:table-cell>
          <table:table-cell office:value-type="string">
            <text:p>OCAMPO C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ienecorre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BRYAN</text:p>
          </table:table-cell>
          <table:table-cell office:value-type="string">
            <text:p>OCAMPO GARZ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ampogarzonbryan@gmail.com</text:p>
          </table:table-cell>
          <table:table-cell office:value-type="float" office:value="7.67">
            <text:p>7.67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0.42">
            <text:p>20.42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uber Arley</text:p>
          </table:table-cell>
          <table:table-cell office:value-type="string">
            <text:p>Ocampo Roj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rl34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ffrey Lerody</text:p>
          </table:table-cell>
          <table:table-cell office:value-type="string">
            <text:p>Oje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lo@gmail.com</text:p>
          </table:table-cell>
          <table:table-cell office:value-type="float" office:value="6.17">
            <text:p>6.17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4.92">
            <text:p>14.92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Antonio</text:p>
          </table:table-cell>
          <table:table-cell office:value-type="string">
            <text:p>Oje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jedallanos1e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YLAN FERNANDO</text:p>
          </table:table-cell>
          <table:table-cell office:value-type="string">
            <text:p>OJEDA DUQ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ylanojedaduque@gmail.com</text:p>
          </table:table-cell>
          <table:table-cell office:value-type="float" office:value="7.33">
            <text:p>7.33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6.08">
            <text:p>16.0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JAIRO</text:p>
          </table:table-cell>
          <table:table-cell office:value-type="string">
            <text:p>OLARTE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ONJA_0921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OLIVA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livaressantiago379@gmail.com</text:p>
          </table:table-cell>
          <table:table-cell office:value-type="float" office:value="8.50">
            <text:p>8.5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20.25">
            <text:p>20.2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ichell</text:p>
          </table:table-cell>
          <table:table-cell office:value-type="string">
            <text:p>Oquendo Gonzá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chellog1@hot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ANA ISABEL</text:p>
          </table:table-cell>
          <table:table-cell office:value-type="string">
            <text:p>OQUENDO OQUE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quendoisabel1985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és Felipe</text:p>
          </table:table-cell>
          <table:table-cell office:value-type="string">
            <text:p>Ordoñez Ci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ciro1999@outlook.es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Blanca Dianira</text:p>
          </table:table-cell>
          <table:table-cell office:value-type="string">
            <text:p>Ordoñez Rami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lanca.ordonez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Jefferson</text:p>
          </table:table-cell>
          <table:table-cell office:value-type="string">
            <text:p>Orjuela Zapa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fferson@gmail.com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liecer David</text:p>
          </table:table-cell>
          <table:table-cell office:value-type="string">
            <text:p>Orozco Alv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iecerorozco80@hot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Z NELLY</text:p>
          </table:table-cell>
          <table:table-cell office:value-type="string">
            <text:p>OROZCO CARDO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rvicioalcliente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THA LIBIA</text:p>
          </table:table-cell>
          <table:table-cell office:value-type="string">
            <text:p>OROZCO CARMO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o.m184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alter Fabian</text:p>
          </table:table-cell>
          <table:table-cell office:value-type="string">
            <text:p>Orozco Isa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alterorozco3@hot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velin</text:p>
          </table:table-cell>
          <table:table-cell office:value-type="string">
            <text:p>Orozco Mejí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nj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WIN RAFAEL</text:p>
          </table:table-cell>
          <table:table-cell office:value-type="string">
            <text:p>OROZCO MOLI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ozcoedwin412@gmail.com</text:p>
          </table:table-cell>
          <table:table-cell office:value-type="float" office:value="9.83">
            <text:p>9.83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8.58">
            <text:p>18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ULIE MARITZA</text:p>
          </table:table-cell>
          <table:table-cell office:value-type="string">
            <text:p>ORTEGA GAR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ulie1231@hot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 Alejandra</text:p>
          </table:table-cell>
          <table:table-cell office:value-type="string">
            <text:p>Ortega Mendo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a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Fernando</text:p>
          </table:table-cell>
          <table:table-cell office:value-type="string">
            <text:p>Ortega Velas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fo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83">
            <text:p>19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TEFHANY</text:p>
          </table:table-cell>
          <table:table-cell office:value-type="string">
            <text:p>ORTIS VARG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tefaniortizvarga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Patrick Alexander</text:p>
          </table:table-cell>
          <table:table-cell office:value-type="string">
            <text:p>Ortiz Alonz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trick.ortiz@firpla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ffrey Marlon</text:p>
          </table:table-cell>
          <table:table-cell office:value-type="string">
            <text:p>Ortiz Bece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freyb0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amiro</text:p>
          </table:table-cell>
          <table:table-cell office:value-type="string">
            <text:p>Ortiz Cuent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tizcuentasramiro@gmail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1.75">
            <text:p>21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LSON ARLEY</text:p>
          </table:table-cell>
          <table:table-cell office:value-type="string">
            <text:p>ORTIZ TABOR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tizwilson2013@gmail.com</text:p>
          </table:table-cell>
          <table:table-cell office:value-type="float" office:value="8.83">
            <text:p>8.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83">
            <text:p>8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muel</text:p>
          </table:table-cell>
          <table:table-cell office:value-type="string">
            <text:p>Ortiz To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tizsamuel1408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URANY ANDREA</text:p>
          </table:table-cell>
          <table:table-cell office:value-type="string">
            <text:p>ORTIZ TOR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URANYTORRES07@HOT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8.75">
            <text:p>18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der</text:p>
          </table:table-cell>
          <table:table-cell office:value-type="string">
            <text:p>Ortiz Tov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onderortiz25@gmail.com</text:p>
          </table:table-cell>
          <table:table-cell office:value-type="float" office:value="10.00">
            <text:p>10.0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17.50">
            <text:p>17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ny Rafael</text:p>
          </table:table-cell>
          <table:table-cell office:value-type="string">
            <text:p>Ortiz Tov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ONNYORTIZ199403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ERALDINE</text:p>
          </table:table-cell>
          <table:table-cell office:value-type="string">
            <text:p>OSORIO LÓ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ferlope231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 CAMILA</text:p>
          </table:table-cell>
          <table:table-cell office:value-type="string">
            <text:p>OSORIO MAZ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zocamila22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.00">
            <text:p>2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 Felipe</text:p>
          </table:table-cell>
          <table:table-cell office:value-type="string">
            <text:p>Osorio Orteg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elfelipeosorioortega@gmail.com</text:p>
          </table:table-cell>
          <table:table-cell office:value-type="float" office:value="7.67">
            <text:p>7.67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6.42">
            <text:p>16.42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XIS</text:p>
          </table:table-cell>
          <table:table-cell office:value-type="string">
            <text:p>OSORIO ORTI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isosorioortiz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teo</text:p>
          </table:table-cell>
          <table:table-cell office:value-type="string">
            <text:p>Osorio Ri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te-lomejor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BEATRIZ ELENA</text:p>
          </table:table-cell>
          <table:table-cell office:value-type="string">
            <text:p>OSORIO RODRI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eaiso0314@g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INA CLARITZA</text:p>
          </table:table-cell>
          <table:table-cell office:value-type="string">
            <text:p>OSORIO V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NAOSORIO2487@GMAIL.COM</text:p>
          </table:table-cell>
          <table:table-cell office:value-type="float" office:value="6.83">
            <text:p>6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6.83">
            <text:p>16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OSORIO ZAPA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oriozapata2010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</text:p>
          </table:table-cell>
          <table:table-cell office:value-type="string">
            <text:p>Ospi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pinaandres234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CELA</text:p>
          </table:table-cell>
          <table:table-cell office:value-type="string">
            <text:p>OSPI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ce.ospina@outloo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PABLO EMILIO</text:p>
          </table:table-cell>
          <table:table-cell office:value-type="string">
            <text:p>OSPINA AGUDE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piagudelopablo@gmail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1.75">
            <text:p>21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BA LUCIA</text:p>
          </table:table-cell>
          <table:table-cell office:value-type="string">
            <text:p>OSPINA GUE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ocpina@hot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83">
            <text:p>19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MANUEL</text:p>
          </table:table-cell>
          <table:table-cell office:value-type="string">
            <text:p>OSPINA MONT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pinamontoyajuan37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FERNANDO</text:p>
          </table:table-cell>
          <table:table-cell office:value-type="string">
            <text:p>OSPINA RINC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pinaluisfernando@gmail.com</text:p>
          </table:table-cell>
          <table:table-cell office:value-type="float" office:value="6.67">
            <text:p>6.67</text:p>
          </table:table-cell>
          <table:table-cell office:value-type="float" office:value="8.75">
            <text:p>8.75</text:p>
          </table:table-cell>
          <table:table-cell office:value-type="float" office:value="2.00">
            <text:p>2.00</text:p>
          </table:table-cell>
          <table:table-cell office:value-type="float" office:value="17.42">
            <text:p>17.42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Fernando</text:p>
          </table:table-cell>
          <table:table-cell office:value-type="string">
            <text:p>Ospina Tob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fost@outloo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aime Alonso</text:p>
          </table:table-cell>
          <table:table-cell office:value-type="string">
            <text:p>Otalvaro Monc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talvaromoncada15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QUENI YOJANA</text:p>
          </table:table-cell>
          <table:table-cell office:value-type="string">
            <text:p>OTERO SABAL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oraynicolserpa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GELLO JOSUE</text:p>
          </table:table-cell>
          <table:table-cell office:value-type="string">
            <text:p>OVALLE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gelloovallesanchez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ana Margarita</text:p>
          </table:table-cell>
          <table:table-cell office:value-type="string">
            <text:p>Oviedo 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anamargaritaoviedo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ite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.galindez@firpla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ULI LORENA</text:p>
          </table:table-cell>
          <table:table-cell office:value-type="string">
            <text:p>PABÓN RESTRE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ulil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Oleinis</text:p>
          </table:table-cell>
          <table:table-cell office:value-type="string">
            <text:p>Pachecho Ari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leinisp@gmail.com</text:p>
          </table:table-cell>
          <table:table-cell office:value-type="float" office:value="9.00">
            <text:p>9.0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16.50">
            <text:p>16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VICTOR DANILO PACHECO</text:p>
          </table:table-cell>
          <table:table-cell office:value-type="string">
            <text:p>PACHE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ctorpacheco17@gmail.com</text:p>
          </table:table-cell>
          <table:table-cell office:value-type="float" office:value="9.50">
            <text:p>9.5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21.25">
            <text:p>21.2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David</text:p>
          </table:table-cell>
          <table:table-cell office:value-type="string">
            <text:p>Padilla Baró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83">
            <text:p>19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y</text:p>
          </table:table-cell>
          <table:table-cell office:value-type="string">
            <text:p>Paez Rodri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ketplace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Brayan Camilo</text:p>
          </table:table-cell>
          <table:table-cell office:value-type="string">
            <text:p>Palac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ayancc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 Camilo</text:p>
          </table:table-cell>
          <table:table-cell office:value-type="string">
            <text:p>Palac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camilop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José</text:p>
          </table:table-cell>
          <table:table-cell office:value-type="string">
            <text:p>Palac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jpalacio07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erney</text:p>
          </table:table-cell>
          <table:table-cell office:value-type="string">
            <text:p>Palacio Loai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erneypalacio993@gmail.com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izeth</text:p>
          </table:table-cell>
          <table:table-cell office:value-type="string">
            <text:p>Palacio Loz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zeth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OSMAN</text:p>
          </table:table-cell>
          <table:table-cell office:value-type="string">
            <text:p>PALACIO MONT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manpalacio252@hotmail.com</text:p>
          </table:table-cell>
          <table:table-cell office:value-type="float" office:value="8.50">
            <text:p>8.5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7.25">
            <text:p>17.2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Mario</text:p>
          </table:table-cell>
          <table:table-cell office:value-type="string">
            <text:p>Palacio Restre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mpr@gmail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7.75">
            <text:p>17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Brayan Alexis</text:p>
          </table:table-cell>
          <table:table-cell office:value-type="string">
            <text:p>Palaci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ayanaa@gmail.com</text:p>
          </table:table-cell>
          <table:table-cell office:value-type="float" office:value="8.83">
            <text:p>8.83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83">
            <text:p>22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WIN DAVID</text:p>
          </table:table-cell>
          <table:table-cell office:value-type="string">
            <text:p>PALACIOS CORDOB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wind1212@gmail.com</text:p>
          </table:table-cell>
          <table:table-cell office:value-type="float" office:value="8.67">
            <text:p>8.67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1.67">
            <text:p>21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NUEL SENCION</text:p>
          </table:table-cell>
          <table:table-cell office:value-type="string">
            <text:p>PALACIOS CORDOB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uelse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ISON ANDRES</text:p>
          </table:table-cell>
          <table:table-cell office:value-type="string">
            <text:p>PALACIOS CORDOB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iisiitoapasiito@gmail.com</text:p>
          </table:table-cell>
          <table:table-cell office:value-type="float" office:value="8.83">
            <text:p>8.83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7.58">
            <text:p>17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PABLO</text:p>
          </table:table-cell>
          <table:table-cell office:value-type="string">
            <text:p>PALACIOS LU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luna.79@hotmail.com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Breidi</text:p>
          </table:table-cell>
          <table:table-cell office:value-type="string">
            <text:p>Palacios Mur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eidi1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XANDER</text:p>
          </table:table-cell>
          <table:table-cell office:value-type="string">
            <text:p>PALACIOS RIV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anderpalaciosrivera@gmail.com</text:p>
          </table:table-cell>
          <table:table-cell office:value-type="float" office:value="6.67">
            <text:p>6.67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6.67">
            <text:p>16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AN ESTEBAN</text:p>
          </table:table-cell>
          <table:table-cell office:value-type="string">
            <text:p>PALACIOS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tebansanchez29777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VER</text:p>
          </table:table-cell>
          <table:table-cell office:value-type="string">
            <text:p>PALOMEQUE ME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quever20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</text:p>
          </table:table-cell>
          <table:table-cell office:value-type="string">
            <text:p>Pantoj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mpahe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ward Elvis</text:p>
          </table:table-cell>
          <table:table-cell office:value-type="string">
            <text:p>Paredes Bolív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wardep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Arnulfo</text:p>
          </table:table-cell>
          <table:table-cell office:value-type="string">
            <text:p>Parra Acosta 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22parraa@g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ERNEY JOVANY</text:p>
          </table:table-cell>
          <table:table-cell office:value-type="string">
            <text:p>PARRA C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rracanoferney.76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vidson Stiven</text:p>
          </table:table-cell>
          <table:table-cell office:value-type="string">
            <text:p>Parra Cardo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vid21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 Steven</text:p>
          </table:table-cell>
          <table:table-cell office:value-type="string">
            <text:p>Parra Ló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els@gmail.com</text:p>
          </table:table-cell>
          <table:table-cell office:value-type="float" office:value="9.50">
            <text:p>9.5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50">
            <text:p>24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oiber Enrique</text:p>
          </table:table-cell>
          <table:table-cell office:value-type="string">
            <text:p>Paterni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roiber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HECTOR  DE JESÚS</text:p>
          </table:table-cell>
          <table:table-cell office:value-type="string">
            <text:p>PATI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tor.patiño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ulieth</text:p>
          </table:table-cell>
          <table:table-cell office:value-type="string">
            <text:p>Pati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ronicapatino34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Esteban</text:p>
          </table:table-cell>
          <table:table-cell office:value-type="string">
            <text:p>Patiño Cor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patino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a Alejandra</text:p>
          </table:table-cell>
          <table:table-cell office:value-type="string">
            <text:p>Patiño Isa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nsdfh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 Alejandra</text:p>
          </table:table-cell>
          <table:table-cell office:value-type="string">
            <text:p>Patiño Muñ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ap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Gabriel</text:p>
          </table:table-cell>
          <table:table-cell office:value-type="string">
            <text:p>Paya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payares@gmail.com</text:p>
          </table:table-cell>
          <table:table-cell office:value-type="float" office:value="8.67">
            <text:p>8.67</text:p>
          </table:table-cell>
          <table:table-cell office:value-type="float" office:value="8.75">
            <text:p>8.75</text:p>
          </table:table-cell>
          <table:table-cell office:value-type="float" office:value="5.00">
            <text:p>5.00</text:p>
          </table:table-cell>
          <table:table-cell office:value-type="float" office:value="22.42">
            <text:p>22.42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Nelson Alcides</text:p>
          </table:table-cell>
          <table:table-cell office:value-type="string">
            <text:p>Pelaez Tor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elson27pelaez@hotmail.com</text:p>
          </table:table-cell>
          <table:table-cell office:value-type="float" office:value="8.00">
            <text:p>8.0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19.75">
            <text:p>19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sus David</text:p>
          </table:table-cell>
          <table:table-cell office:value-type="string">
            <text:p>Peña Narvá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dp@gmail.com</text:p>
          </table:table-cell>
          <table:table-cell office:value-type="float" office:value="7.83">
            <text:p>7.83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6.58">
            <text:p>16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tha Milena</text:p>
          </table:table-cell>
          <table:table-cell office:value-type="string">
            <text:p>Peña Ve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lena.pena@firpla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Penagos Cordob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ipenagos93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RLOS</text:p>
          </table:table-cell>
          <table:table-cell office:value-type="string">
            <text:p>PENAGOS GOM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penagos1120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sid</text:p>
          </table:table-cell>
          <table:table-cell office:value-type="string">
            <text:p>Peñuela Sarab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ineryesid199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ONIEL DIONICIO</text:p>
          </table:table-cell>
          <table:table-cell office:value-type="string">
            <text:p>PERAZA TOR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oniciotorres846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Brayan</text:p>
          </table:table-cell>
          <table:table-cell office:value-type="string">
            <text:p>Perea Flo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eaflorezb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ston David</text:p>
          </table:table-cell>
          <table:table-cell office:value-type="string">
            <text:p>Perea Pe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eadavid58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abián Esteban</text:p>
          </table:table-cell>
          <table:table-cell office:value-type="string">
            <text:p>Pereira Cardo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kr4595fabia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Hugo Armando</text:p>
          </table:table-cell>
          <table:table-cell office:value-type="string">
            <text:p>Pereira Lo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periralora@Gmail.com</text:p>
          </table:table-cell>
          <table:table-cell office:value-type="float" office:value="8.83">
            <text:p>8.83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16.33">
            <text:p>16.3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avid</text:p>
          </table:table-cell>
          <table:table-cell office:value-type="string">
            <text:p>Pé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perez5487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iovanny de Jesus</text:p>
          </table:table-cell>
          <table:table-cell office:value-type="string">
            <text:p>Perez Bed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iovannyperezbedoya67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83">
            <text:p>19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ANDRES</text:p>
          </table:table-cell>
          <table:table-cell office:value-type="string">
            <text:p>PEREZ FLO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perez71273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mil David</text:p>
          </table:table-cell>
          <table:table-cell office:value-type="string">
            <text:p>Pérez Gonzá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ildavidperezgonzalez19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BASTIAN</text:p>
          </table:table-cell>
          <table:table-cell office:value-type="string">
            <text:p>PEREZ JARAM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basperezja8743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nuel Segundo</text:p>
          </table:table-cell>
          <table:table-cell office:value-type="string">
            <text:p>Perez Marti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uelperezmartinez648@gmail.com</text:p>
          </table:table-cell>
          <table:table-cell office:value-type="float" office:value="9.67">
            <text:p>9.67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67">
            <text:p>22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ohan Estiven</text:p>
          </table:table-cell>
          <table:table-cell office:value-type="string">
            <text:p>Perez Ocho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ohan@gmail.com</text:p>
          </table:table-cell>
          <table:table-cell office:value-type="float" office:value="7.50">
            <text:p>7.50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0.25">
            <text:p>20.2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 ELENA</text:p>
          </table:table-cell>
          <table:table-cell office:value-type="string">
            <text:p>PEREZ OSPI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a.perez@firplak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eison</text:p>
          </table:table-cell>
          <table:table-cell office:value-type="string">
            <text:p>Pérez Pad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ezdeison2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OR BIBIANA</text:p>
          </table:table-cell>
          <table:table-cell office:value-type="string">
            <text:p>PEREZ RI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vianaperez.1983@hot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Andrés</text:p>
          </table:table-cell>
          <table:table-cell office:value-type="string">
            <text:p>Pérez Tabor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a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 camilo</text:p>
          </table:table-cell>
          <table:table-cell office:value-type="string">
            <text:p>Perez vaneg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c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eorgie</text:p>
          </table:table-cell>
          <table:table-cell office:value-type="string">
            <text:p>Pero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orgie2@gmail.com</text:p>
          </table:table-cell>
          <table:table-cell office:value-type="float" office:value="9.67">
            <text:p>9.67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67">
            <text:p>23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ys Alberto</text:p>
          </table:table-cell>
          <table:table-cell office:value-type="string">
            <text:p>Pertuz Día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onyspertuz7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ustavo Adolfo</text:p>
          </table:table-cell>
          <table:table-cell office:value-type="string">
            <text:p>Pine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viana8187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nuel Francisco</text:p>
          </table:table-cell>
          <table:table-cell office:value-type="string">
            <text:p>Pineda Paterni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uelpinedapaternina1990@gmail.com</text:p>
          </table:table-cell>
          <table:table-cell office:value-type="float" office:value="6.00">
            <text:p>6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4.75">
            <text:p>14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Alejandro</text:p>
          </table:table-cell>
          <table:table-cell office:value-type="string">
            <text:p>Pi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andropino2026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uri Andrea</text:p>
          </table:table-cell>
          <table:table-cell office:value-type="string">
            <text:p>Pino Plaz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kf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EISY YURANY</text:p>
          </table:table-cell>
          <table:table-cell office:value-type="string">
            <text:p>PINO VAS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isypino16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ONICA JULIETH</text:p>
          </table:table-cell>
          <table:table-cell office:value-type="string">
            <text:p>PINZON GONZA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ijuma1401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ana Carolina</text:p>
          </table:table-cell>
          <table:table-cell office:value-type="string">
            <text:p>Pinzón Rodrí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sal2@hot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 Camilo</text:p>
          </table:table-cell>
          <table:table-cell office:value-type="string">
            <text:p>Pi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nnn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Pizarro Duq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felipe101283@outloo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erson David</text:p>
          </table:table-cell>
          <table:table-cell office:value-type="string">
            <text:p>Pla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ersond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Sebastian</text:p>
          </table:table-cell>
          <table:table-cell office:value-type="string">
            <text:p>Polo Ari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oloariasjuan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obert Enrique</text:p>
          </table:table-cell>
          <table:table-cell office:value-type="string">
            <text:p>Pombo Po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efimosquera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ison Yohany</text:p>
          </table:table-cell>
          <table:table-cell office:value-type="string">
            <text:p>Porras Buitra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ison.porras@firpla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Bárbara Gabriela</text:p>
          </table:table-cell>
          <table:table-cell office:value-type="string">
            <text:p>Portillo Guerr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rbaraportillo26@g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2.75">
            <text:p>22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iguel Ángel</text:p>
          </table:table-cell>
          <table:table-cell office:value-type="string">
            <text:p>Pos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ga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iguel Ángel</text:p>
          </table:table-cell>
          <table:table-cell office:value-type="string">
            <text:p>Posada Muñ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guelposada6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ego Andrés</text:p>
          </table:table-cell>
          <table:table-cell office:value-type="string">
            <text:p>Pos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goposso@gmail.com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Felipe</text:p>
          </table:table-cell>
          <table:table-cell office:value-type="string">
            <text:p>Posso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p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Gregorio</text:p>
          </table:table-cell>
          <table:table-cell office:value-type="string">
            <text:p>Prieto Perei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gre@gmail.com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15.50">
            <text:p>15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LUIS</text:p>
          </table:table-cell>
          <table:table-cell office:value-type="string">
            <text:p>PRINS GALV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nsluisalbert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Puer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iagoppuerta74638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USTAVO ALBERTO</text:p>
          </table:table-cell>
          <table:table-cell office:value-type="string">
            <text:p>PUERTA AREN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RIDMILENA.1357@G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8.75">
            <text:p>18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ONIA HELENA</text:p>
          </table:table-cell>
          <table:table-cell office:value-type="string">
            <text:p>PUERTA PUER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ata-3375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fferson Stive</text:p>
          </table:table-cell>
          <table:table-cell office:value-type="string">
            <text:p>Pulgarí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ffersonstivenp@gmail.com</text:p>
          </table:table-cell>
          <table:table-cell office:value-type="float" office:value="8.83">
            <text:p>8.83</text:p>
          </table:table-cell>
          <table:table-cell office:value-type="float" office:value="8.75">
            <text:p>8.75</text:p>
          </table:table-cell>
          <table:table-cell office:value-type="float" office:value="2.00">
            <text:p>2.00</text:p>
          </table:table-cell>
          <table:table-cell office:value-type="float" office:value="19.58">
            <text:p>19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Fredy</text:p>
          </table:table-cell>
          <table:table-cell office:value-type="string">
            <text:p>Pulgarí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ON2023@GMAIL.COM</text:p>
          </table:table-cell>
          <table:table-cell office:value-type="float" office:value="8.83">
            <text:p>8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83">
            <text:p>18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LMAR ALBERTO</text:p>
          </table:table-cell>
          <table:table-cell office:value-type="string">
            <text:p>PULGARIN ALV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mar942013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 ALEJANDRA</text:p>
          </table:table-cell>
          <table:table-cell office:value-type="string">
            <text:p>PULGARIN LO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apulgar834@gmail.com</text:p>
          </table:table-cell>
          <table:table-cell office:value-type="float" office:value="9.50">
            <text:p>9.5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50">
            <text:p>23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evin</text:p>
          </table:table-cell>
          <table:table-cell office:value-type="string">
            <text:p>Pulgarín Su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vinps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Pablo</text:p>
          </table:table-cell>
          <table:table-cell office:value-type="string">
            <text:p>Quiceno Vas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quicenovelasquez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avid</text:p>
          </table:table-cell>
          <table:table-cell office:value-type="string">
            <text:p>Quijano Roj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davidqr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erson</text:p>
          </table:table-cell>
          <table:table-cell office:value-type="string">
            <text:p>Quint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ienef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obinson</text:p>
          </table:table-cell>
          <table:table-cell office:value-type="string">
            <text:p>Quint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binquintero@gmail.com</text:p>
          </table:table-cell>
          <table:table-cell office:value-type="float" office:value="9.50">
            <text:p>9.5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50">
            <text:p>22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NORBEY ALONSO</text:p>
          </table:table-cell>
          <table:table-cell office:value-type="string">
            <text:p>QUINTERO MAZ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bey191@hotmail.com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ny Arley</text:p>
          </table:table-cell>
          <table:table-cell office:value-type="string">
            <text:p>Quintero Roj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onnyaq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1.00">
            <text:p>21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 ALEJANDRA</text:p>
          </table:table-cell>
          <table:table-cell office:value-type="string">
            <text:p>QUIR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alejandraquiroz74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LSON ANDRES</text:p>
          </table:table-cell>
          <table:table-cell office:value-type="string">
            <text:p>QUIR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irozwilsonand342@gmail.com</text:p>
          </table:table-cell>
          <table:table-cell office:value-type="float" office:value="9.67">
            <text:p>9.67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2.42">
            <text:p>22.42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ILDER ALEJANDRO</text:p>
          </table:table-cell>
          <table:table-cell office:value-type="string">
            <text:p>QUIROZ GALLE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lderalejandro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LEONARDO</text:p>
          </table:table-cell>
          <table:table-cell office:value-type="string">
            <text:p>QUIROZ GUACANEM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leonardoguirozguacaneme32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jandro</text:p>
          </table:table-cell>
          <table:table-cell office:value-type="string">
            <text:p>Quiroz Oque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andraqq@g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21.75">
            <text:p>21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iuns Esteban</text:p>
          </table:table-cell>
          <table:table-cell office:value-type="string">
            <text:p>Ramí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ius1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dier Alexis</text:p>
          </table:table-cell>
          <table:table-cell office:value-type="string">
            <text:p>Ramí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dierramir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Jader</text:p>
          </table:table-cell>
          <table:table-cell office:value-type="string">
            <text:p>Ramí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fsdfadgva@gmail.com</text:p>
          </table:table-cell>
          <table:table-cell office:value-type="float" office:value="6.33">
            <text:p>6.33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5.08">
            <text:p>15.0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Esteban</text:p>
          </table:table-cell>
          <table:table-cell office:value-type="string">
            <text:p>Ramí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ramirez@gmail.com</text:p>
          </table:table-cell>
          <table:table-cell office:value-type="float" office:value="7.67">
            <text:p>7.67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19.42">
            <text:p>19.42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Manuel</text:p>
          </table:table-cell>
          <table:table-cell office:value-type="string">
            <text:p>Ramí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mr@gmail.com</text:p>
          </table:table-cell>
          <table:table-cell office:value-type="float" office:value="8.33">
            <text:p>8.33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1.33">
            <text:p>21.3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UVAN ANDRES</text:p>
          </table:table-cell>
          <table:table-cell office:value-type="string">
            <text:p>RAMIREZ AGUDE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uvanramirez202008@outloo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INA MARCELA</text:p>
          </table:table-cell>
          <table:table-cell office:value-type="string">
            <text:p>RAMÍREZ BED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namarcelaramire129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Manuel</text:p>
          </table:table-cell>
          <table:table-cell office:value-type="string">
            <text:p>Ramírez C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mrr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Y ALEJANDRO</text:p>
          </table:table-cell>
          <table:table-cell office:value-type="string">
            <text:p>RAMIREZ CONTRER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amirezdany485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AVID</text:p>
          </table:table-cell>
          <table:table-cell office:value-type="string">
            <text:p>RAMIREZ ECHEVERR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dre810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ISON ALEXIS</text:p>
          </table:table-cell>
          <table:table-cell office:value-type="string">
            <text:p>RAMIREZ FERNA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gfd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ranyiner Jose</text:p>
          </table:table-cell>
          <table:table-cell office:value-type="string">
            <text:p>Ramirez Herná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anyinerr@gmail.com</text:p>
          </table:table-cell>
          <table:table-cell office:value-type="float" office:value="8.50">
            <text:p>8.50</text:p>
          </table:table-cell>
          <table:table-cell office:value-type="float" office:value="6.25">
            <text:p>6.25</text:p>
          </table:table-cell>
          <table:table-cell office:value-type="float" office:value="3.00">
            <text:p>3.00</text:p>
          </table:table-cell>
          <table:table-cell office:value-type="float" office:value="17.75">
            <text:p>17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</text:p>
          </table:table-cell>
          <table:table-cell office:value-type="string">
            <text:p>Ramírez Ló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GE ORLANDO</text:p>
          </table:table-cell>
          <table:table-cell office:value-type="string">
            <text:p>RAMIREZ MENDOZA 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amirezmendozajorge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evin Dario</text:p>
          </table:table-cell>
          <table:table-cell office:value-type="string">
            <text:p>Ramirez Osor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vinro1227@gmail.com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7.00">
            <text:p>17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uvan Esteban</text:p>
          </table:table-cell>
          <table:table-cell office:value-type="string">
            <text:p>Ramirez Ru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uvanramirezrua7489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liana</text:p>
          </table:table-cell>
          <table:table-cell office:value-type="string">
            <text:p>Ramírez Valen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rava90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A MARIA</text:p>
          </table:table-cell>
          <table:table-cell office:value-type="string">
            <text:p>RAMIREZ ZULE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arazu95@gmail.com</text:p>
          </table:table-cell>
          <table:table-cell office:value-type="float" office:value="7.83">
            <text:p>7.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83">
            <text:p>7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asser Andrés</text:p>
          </table:table-cell>
          <table:table-cell office:value-type="string">
            <text:p>Ram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ksdhgsb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</text:p>
          </table:table-cell>
          <table:table-cell office:value-type="string">
            <text:p>Ramos Sie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rs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Heidy Tatiana</text:p>
          </table:table-cell>
          <table:table-cell office:value-type="string">
            <text:p>Rebolledo Zapa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atis_930418@hot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ilton David</text:p>
          </table:table-cell>
          <table:table-cell office:value-type="string">
            <text:p>Rendó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lrendonto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LFER ANDRES</text:p>
          </table:table-cell>
          <table:table-cell office:value-type="string">
            <text:p>RENDÓN ESTR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FERANDRESRENDONESTRAD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ison Alberto</text:p>
          </table:table-cell>
          <table:table-cell office:value-type="string">
            <text:p>Rengifo Rodri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ison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1.00">
            <text:p>21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VID ESTEBAN</text:p>
          </table:table-cell>
          <table:table-cell office:value-type="string">
            <text:p>RESTRE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teban.restrepo@FIRPLA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win</text:p>
          </table:table-cell>
          <table:table-cell office:value-type="string">
            <text:p>Restre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win1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evin Andrés</text:p>
          </table:table-cell>
          <table:table-cell office:value-type="string">
            <text:p>Restre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jh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obinson</text:p>
          </table:table-cell>
          <table:table-cell office:value-type="string">
            <text:p>Restrepo Aren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binrestrepo628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BERNARDO ALFREDO</text:p>
          </table:table-cell>
          <table:table-cell office:value-type="string">
            <text:p>RESTREPO CAL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errnardo.restrepo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Hector Santiago</text:p>
          </table:table-cell>
          <table:table-cell office:value-type="string">
            <text:p>Restrepo Gale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ctorsa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ISON ALVEIRO</text:p>
          </table:table-cell>
          <table:table-cell office:value-type="string">
            <text:p>RESTREPO GUTIÉR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yerockrt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RESTREPO HERNA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trepohernandezsantiag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N EDILBERTO</text:p>
          </table:table-cell>
          <table:table-cell office:value-type="string">
            <text:p>RESTREPO HINCAP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hnrestrepo1115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m Armando</text:p>
          </table:table-cell>
          <table:table-cell office:value-type="string">
            <text:p>Restrepo Jime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estrepoj93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LAUDIA MARIA</text:p>
          </table:table-cell>
          <table:table-cell office:value-type="string">
            <text:p>RESTREPO MENDO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audia.restrepo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ISON SEBASTIÁN</text:p>
          </table:table-cell>
          <table:table-cell office:value-type="string">
            <text:p>RESTREPO MUÑ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basdarksoul@hot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BASTIAN</text:p>
          </table:table-cell>
          <table:table-cell office:value-type="string">
            <text:p>RESTREPO OSOR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bastianr010@hot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 Esteban</text:p>
          </table:table-cell>
          <table:table-cell office:value-type="string">
            <text:p>Restrepo Pulgar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ele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RESTREPO RESTRE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ocampo2015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N ALEXANDER</text:p>
          </table:table-cell>
          <table:table-cell office:value-type="string">
            <text:p>RESTREPO TAMAY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trepotamayojohn37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RESTREPO TANGAR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irestrepotangarife319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83">
            <text:p>23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lon Alejandro</text:p>
          </table:table-cell>
          <table:table-cell office:value-type="string">
            <text:p>Restrepo Vé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lonalejandrorestrepovelez@gmail.com</text:p>
          </table:table-cell>
          <table:table-cell office:value-type="float" office:value="8.00">
            <text:p>8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6.75">
            <text:p>16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tonio José</text:p>
          </table:table-cell>
          <table:table-cell office:value-type="string">
            <text:p>Rev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toniojoserevilla@gmail.com</text:p>
          </table:table-cell>
          <table:table-cell office:value-type="float" office:value="9.67">
            <text:p>9.67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67">
            <text:p>23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ACKSON</text:p>
          </table:table-cell>
          <table:table-cell office:value-type="string">
            <text:p>REV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cksonrevilla@gmail.com</text:p>
          </table:table-cell>
          <table:table-cell office:value-type="float" office:value="8.00">
            <text:p>8.00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0.75">
            <text:p>20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uricio</text:p>
          </table:table-cell>
          <table:table-cell office:value-type="string">
            <text:p>Reyes Rodrí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uricio@gmail.com</text:p>
          </table:table-cell>
          <table:table-cell office:value-type="float" office:value="9.83">
            <text:p>9.83</text:p>
          </table:table-cell>
          <table:table-cell office:value-type="float" office:value="6.25">
            <text:p>6.25</text:p>
          </table:table-cell>
          <table:table-cell office:value-type="float" office:value="4.00">
            <text:p>4.00</text:p>
          </table:table-cell>
          <table:table-cell office:value-type="float" office:value="20.08">
            <text:p>20.0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milo</text:p>
          </table:table-cell>
          <table:table-cell office:value-type="string">
            <text:p>Riales Blan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milorialess@gmail.com</text:p>
          </table:table-cell>
          <table:table-cell office:value-type="float" office:value="7.67">
            <text:p>7.67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6.42">
            <text:p>16.42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MAN EDGAR</text:p>
          </table:table-cell>
          <table:table-cell office:value-type="string">
            <text:p>RICO IBA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barrajorman00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ICARDO</text:p>
          </table:table-cell>
          <table:table-cell office:value-type="string">
            <text:p>RINCON ECHEVER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inconecheverryricardo28462@gmail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float" office:value="5.00">
            <text:p>5.00</text:p>
          </table:table-cell>
          <table:table-cell office:value-type="float" office:value="22.75">
            <text:p>22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a Yelania</text:p>
          </table:table-cell>
          <table:table-cell office:value-type="string">
            <text:p>Rios Delga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ayelania.26@gmail.com</text:p>
          </table:table-cell>
          <table:table-cell office:value-type="float" office:value="8.00">
            <text:p>8.00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0.75">
            <text:p>20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LKIN ARNULFO</text:p>
          </table:table-cell>
          <table:table-cell office:value-type="string">
            <text:p>RIOS RAMI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kinrios341@gmail.com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DRA LORENA</text:p>
          </table:table-cell>
          <table:table-cell office:value-type="string">
            <text:p>RÍOS RAMI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dralorena8602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Andrés</text:p>
          </table:table-cell>
          <table:table-cell office:value-type="string">
            <text:p>Riv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eni2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AVID</text:p>
          </table:table-cell>
          <table:table-cell office:value-type="string">
            <text:p>RIV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ivasjuandavid7386@gmail.com</text:p>
          </table:table-cell>
          <table:table-cell office:value-type="float" office:value="8.50">
            <text:p>8.5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50">
            <text:p>22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URICIO</text:p>
          </table:table-cell>
          <table:table-cell office:value-type="string">
            <text:p>RIVAS HIDAL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ivashidalgomaurici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URICIO</text:p>
          </table:table-cell>
          <table:table-cell office:value-type="string">
            <text:p>RIVAS HIDAL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uriciorivashidalgo12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DAN YESID</text:p>
          </table:table-cell>
          <table:table-cell office:value-type="string">
            <text:p>RIVAS MOSQU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rdanmosquerarivera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ULIANA ANDREA</text:p>
          </table:table-cell>
          <table:table-cell office:value-type="string">
            <text:p>RIVAS MOSQU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skr0709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MANUEL</text:p>
          </table:table-cell>
          <table:table-cell office:value-type="string">
            <text:p>RIVERA ME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iveramesaem8564@gmail.com</text:p>
          </table:table-cell>
          <table:table-cell office:value-type="float" office:value="6.83">
            <text:p>6.83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1.83">
            <text:p>21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OSWALDO</text:p>
          </table:table-cell>
          <table:table-cell office:value-type="string">
            <text:p>RIVERA TABOR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waldo.rivera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CAS</text:p>
          </table:table-cell>
          <table:table-cell office:value-type="string">
            <text:p>RIVILLAS ARRUB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kaz1129@gmail.com</text:p>
          </table:table-cell>
          <table:table-cell office:value-type="float" office:value="9.67">
            <text:p>9.67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67">
            <text:p>19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lio Cesar</text:p>
          </table:table-cell>
          <table:table-cell office:value-type="string">
            <text:p>Robledo Me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bledomenaj9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YNDI SIRLEY</text:p>
          </table:table-cell>
          <table:table-cell office:value-type="string">
            <text:p>RODAS ARA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luna190.chic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manuel</text:p>
          </table:table-cell>
          <table:table-cell office:value-type="string">
            <text:p>Rodas Menes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kjhg@gmail.com</text:p>
          </table:table-cell>
          <table:table-cell office:value-type="float" office:value="8.50">
            <text:p>8.5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7.25">
            <text:p>17.2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ge Mario</text:p>
          </table:table-cell>
          <table:table-cell office:value-type="string">
            <text:p>Rodrí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rgemr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a Fernanda</text:p>
          </table:table-cell>
          <table:table-cell office:value-type="string">
            <text:p>Rodrí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rodrigu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RODRIGUEZ CADE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283888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avier Eduardo</text:p>
          </table:table-cell>
          <table:table-cell office:value-type="string">
            <text:p>Rodríguez Cast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rodriguez45817@gmail.com</text:p>
          </table:table-cell>
          <table:table-cell office:value-type="float" office:value="8.67">
            <text:p>8.67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67">
            <text:p>18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AVIER ENRIQUE</text:p>
          </table:table-cell>
          <table:table-cell office:value-type="string">
            <text:p>RODRÍGUEZ GONZÁ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rredimi218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GE DANIEL</text:p>
          </table:table-cell>
          <table:table-cell office:value-type="string">
            <text:p>RODRIGUEZ MIJA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rgerodriguezmi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83">
            <text:p>23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Rodríguez Rodrí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r691788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erney de Jesús</text:p>
          </table:table-cell>
          <table:table-cell office:value-type="string">
            <text:p>Rodriguez Rodri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erneyrodrirodri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RODRÍGUEZ SO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rodriguezand1992@hotmail.com</text:p>
          </table:table-cell>
          <table:table-cell office:value-type="float" office:value="7.50">
            <text:p>7.5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15.00">
            <text:p>1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RGIO</text:p>
          </table:table-cell>
          <table:table-cell office:value-type="string">
            <text:p>RODRIGUEZ TAV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rgiorodriguezt777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Pablo</text:p>
          </table:table-cell>
          <table:table-cell office:value-type="string">
            <text:p>Rodriguez Veg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pablor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DIER HUMBERTO</text:p>
          </table:table-cell>
          <table:table-cell office:value-type="string">
            <text:p>RODRIGUEZ VE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dieralejandro107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XANDER</text:p>
          </table:table-cell>
          <table:table-cell office:value-type="string">
            <text:p>ROJ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andeer.1967@hot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 Teresa</text:p>
          </table:table-cell>
          <table:table-cell office:value-type="string">
            <text:p>Roj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a.rojas@porelambiente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aneth</text:p>
          </table:table-cell>
          <table:table-cell office:value-type="string">
            <text:p>Rojas Caball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aneth.rojas@firplak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7.75">
            <text:p>17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xandra María</text:p>
          </table:table-cell>
          <table:table-cell office:value-type="string">
            <text:p>Rojas Gonzá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amcr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Y LUZ</text:p>
          </table:table-cell>
          <table:table-cell office:value-type="string">
            <text:p>ROJAS LOAI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yluzrjojas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TEO</text:p>
          </table:table-cell>
          <table:table-cell office:value-type="string">
            <text:p>ROJAS MEJ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teorojasmeji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aura Sofía</text:p>
          </table:table-cell>
          <table:table-cell office:value-type="string">
            <text:p>Rojas Pine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aura.rojas18@uptc.edu.co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MAURICIO</text:p>
          </table:table-cell>
          <table:table-cell office:value-type="string">
            <text:p>ROJAS TOB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.rojas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 Mauricio</text:p>
          </table:table-cell>
          <table:table-cell office:value-type="string">
            <text:p>Roj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m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 Felipe</text:p>
          </table:table-cell>
          <table:table-cell office:value-type="string">
            <text:p>Romaña Me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feli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LIAN ESTEBAN</text:p>
          </table:table-cell>
          <table:table-cell office:value-type="string">
            <text:p>ROMERO MEJ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lian.romero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Mauricio</text:p>
          </table:table-cell>
          <table:table-cell office:value-type="string">
            <text:p>Rosales Góm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ma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on Mario</text:p>
          </table:table-cell>
          <table:table-cell office:value-type="string">
            <text:p>Roy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o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lian</text:p>
          </table:table-cell>
          <table:table-cell office:value-type="string">
            <text:p>Rua Alz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iukx077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BRIAN STIVEN</text:p>
          </table:table-cell>
          <table:table-cell office:value-type="string">
            <text:p>RUA PO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ianruapolo74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aime Andres</text:p>
          </table:table-cell>
          <table:table-cell office:value-type="string">
            <text:p>Rubi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g.obras0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milo</text:p>
          </table:table-cell>
          <table:table-cell office:value-type="string">
            <text:p>Rui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camilorui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SNEIDER</text:p>
          </table:table-cell>
          <table:table-cell office:value-type="string">
            <text:p>RUIZ COR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neiderruizcorre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A FERNANDA</text:p>
          </table:table-cell>
          <table:table-cell office:value-type="string">
            <text:p>RUIZ MARULAN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afernandaruizmaruland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Mario</text:p>
          </table:table-cell>
          <table:table-cell office:value-type="string">
            <text:p>Salabarr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12@gmail.com</text:p>
          </table:table-cell>
          <table:table-cell office:value-type="float" office:value="3.67">
            <text:p>3.67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3.67">
            <text:p>13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EDUARDO</text:p>
          </table:table-cell>
          <table:table-cell office:value-type="string">
            <text:p>SAL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e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n Kevin</text:p>
          </table:table-cell>
          <table:table-cell office:value-type="string">
            <text:p>Salaz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hnsalazar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 Camila</text:p>
          </table:table-cell>
          <table:table-cell office:value-type="string">
            <text:p>Salazar Bland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milasb750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lara Marcela</text:p>
          </table:table-cell>
          <table:table-cell office:value-type="string">
            <text:p>Salazar Gar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nsultorsst@firpla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ELLY JULIETH</text:p>
          </table:table-cell>
          <table:table-cell office:value-type="string">
            <text:p>SALAZAR HERAZ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llysalazarherazo11@g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ANDRES</text:p>
          </table:table-cell>
          <table:table-cell office:value-type="string">
            <text:p>SALAZAR MONT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SALAZARMONTOYA9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VICTOR HUGO</text:p>
          </table:table-cell>
          <table:table-cell office:value-type="string">
            <text:p>SALAZAR MONT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ctor.salazar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ATAN FELIPE</text:p>
          </table:table-cell>
          <table:table-cell office:value-type="string">
            <text:p>SALAZAR PA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onatanfelipe-90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ERNANDO</text:p>
          </table:table-cell>
          <table:table-cell office:value-type="string">
            <text:p>SALAZAR VARG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ernando280986@gmail.com</text:p>
          </table:table-cell>
          <table:table-cell office:value-type="float" office:value="8.83">
            <text:p>8.83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83">
            <text:p>22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N ANDERSON</text:p>
          </table:table-cell>
          <table:table-cell office:value-type="string">
            <text:p>SALDARRIAGA C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gmn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EISON</text:p>
          </table:table-cell>
          <table:table-cell office:value-type="string">
            <text:p>SALDARRIAGA GUARUM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darriagaguarumole@g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2.75">
            <text:p>22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HECTOR ANDRES</text:p>
          </table:table-cell>
          <table:table-cell office:value-type="string">
            <text:p>SALDARRIAGA PALAC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ctor.saldarriaga@firplak.com</text:p>
          </table:table-cell>
          <table:table-cell office:value-type="float" office:value="7.00">
            <text:p>7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5.75">
            <text:p>15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ran Ferberlis</text:p>
          </table:table-cell>
          <table:table-cell office:value-type="string">
            <text:p>Salgado Dia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anf@gmail.com</text:p>
          </table:table-cell>
          <table:table-cell office:value-type="float" office:value="10.00">
            <text:p>10.00</text:p>
          </table:table-cell>
          <table:table-cell office:value-type="float" office:value="7.50">
            <text:p>7.50</text:p>
          </table:table-cell>
          <table:table-cell office:value-type="float" office:value="5.00">
            <text:p>5.00</text:p>
          </table:table-cell>
          <table:table-cell office:value-type="float" office:value="22.50">
            <text:p>22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EGO FERNANDO</text:p>
          </table:table-cell>
          <table:table-cell office:value-type="string">
            <text:p>SANABRIA MO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f.sanabria93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A MARIA</text:p>
          </table:table-cell>
          <table:table-cell office:value-type="string">
            <text:p>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amariasanchez@gmail.com</text:p>
          </table:table-cell>
          <table:table-cell office:value-type="float" office:value="6.67">
            <text:p>6.67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1.67">
            <text:p>21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és Felipe</text:p>
          </table:table-cell>
          <table:table-cell office:value-type="string">
            <text:p>Sá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f11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 SANTIAGO</text:p>
          </table:table-cell>
          <table:table-cell office:value-type="string">
            <text:p>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ansan0218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avid</text:p>
          </table:table-cell>
          <table:table-cell office:value-type="string">
            <text:p>Sá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d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iego</text:p>
          </table:table-cell>
          <table:table-cell office:value-type="string">
            <text:p>Sá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didi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Paulo</text:p>
          </table:table-cell>
          <table:table-cell office:value-type="string">
            <text:p>Sá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paulosanchez1911@gmail.com</text:p>
          </table:table-cell>
          <table:table-cell office:value-type="float" office:value="8.00">
            <text:p>8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6.75">
            <text:p>16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THA MILENA</text:p>
          </table:table-cell>
          <table:table-cell office:value-type="string">
            <text:p>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tha.sanchez@firpla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RLY JANETH</text:p>
          </table:table-cell>
          <table:table-cell office:value-type="string">
            <text:p>SANCHEZ ACEVE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rly_1978@hot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2.75">
            <text:p>22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hoban Daniel</text:p>
          </table:table-cell>
          <table:table-cell office:value-type="string">
            <text:p>Sánchez Aceve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hobansanchez18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GE ENRIQUE</text:p>
          </table:table-cell>
          <table:table-cell office:value-type="string">
            <text:p>SANCHEZ CATA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sbedoya97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FERNANDO</text:p>
          </table:table-cell>
          <table:table-cell office:value-type="string">
            <text:p>SANCHEZ GARC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chezgraces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Brian Stiven</text:p>
          </table:table-cell>
          <table:table-cell office:value-type="string">
            <text:p>Sánchez Herná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ians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LMAR</text:p>
          </table:table-cell>
          <table:table-cell office:value-type="string">
            <text:p>SANCHEZ HOY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lmarsan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GELICA</text:p>
          </table:table-cell>
          <table:table-cell office:value-type="string">
            <text:p>SANCHEZ LO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gelicasanchez1678@g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ebbis</text:p>
          </table:table-cell>
          <table:table-cell office:value-type="string">
            <text:p>Sanchez Merca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bbissm15@outlook.com</text:p>
          </table:table-cell>
          <table:table-cell office:value-type="float" office:value="8.50">
            <text:p>8.5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3.50">
            <text:p>23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sneider</text:p>
          </table:table-cell>
          <table:table-cell office:value-type="string">
            <text:p>Sánchez Mont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neider9703@hotmail.com</text:p>
          </table:table-cell>
          <table:table-cell office:value-type="float" office:value="9.67">
            <text:p>9.67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67">
            <text:p>19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Victor Alejandro</text:p>
          </table:table-cell>
          <table:table-cell office:value-type="string">
            <text:p>Sanchez Mo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ctoralejandrosanchez@gmail.com</text:p>
          </table:table-cell>
          <table:table-cell office:value-type="float" office:value="9.00">
            <text:p>9.00</text:p>
          </table:table-cell>
          <table:table-cell office:value-type="float" office:value="7.50">
            <text:p>7.50</text:p>
          </table:table-cell>
          <table:table-cell office:value-type="float" office:value="4.00">
            <text:p>4.00</text:p>
          </table:table-cell>
          <table:table-cell office:value-type="float" office:value="20.50">
            <text:p>20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RA CATALINA</text:p>
          </table:table-cell>
          <table:table-cell office:value-type="string">
            <text:p>SANCHEZ ORTI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rasanchez322015@outlook.com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7.00">
            <text:p>17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Ider Alejandro</text:p>
          </table:table-cell>
          <table:table-cell office:value-type="string">
            <text:p>Sandoval Herna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andro.sandoval@behome.com.co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uricio</text:p>
          </table:table-cell>
          <table:table-cell office:value-type="string">
            <text:p>Santamar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URICIOSANTAMARIA3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ALBERTO</text:p>
          </table:table-cell>
          <table:table-cell office:value-type="string">
            <text:p>SANTANA FRAN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santanafranco98@gmail.com</text:p>
          </table:table-cell>
          <table:table-cell office:value-type="float" office:value="6.50">
            <text:p>6.5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6.50">
            <text:p>16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air Muñoz</text:p>
          </table:table-cell>
          <table:table-cell office:value-type="string">
            <text:p>Sarmien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airsarmient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EGO ANDRES</text:p>
          </table:table-cell>
          <table:table-cell office:value-type="string">
            <text:p>SEGU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gosegura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LIAN</text:p>
          </table:table-cell>
          <table:table-cell office:value-type="string">
            <text:p>SEGURO MUÑ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unozsegurojulian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Iliana Elvira</text:p>
          </table:table-cell>
          <table:table-cell office:value-type="string">
            <text:p>Seña Charrasqui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ansenacha@hot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TATIANA</text:p>
          </table:table-cell>
          <table:table-cell office:value-type="string">
            <text:p>SEPULVEDA GALLE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atiana.sepulveda@firplak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8.75">
            <text:p>18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maris</text:p>
          </table:table-cell>
          <table:table-cell office:value-type="string">
            <text:p>Sepulveda Hurta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mari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ILDARDO</text:p>
          </table:table-cell>
          <table:table-cell office:value-type="string">
            <text:p>SER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serna17@hot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83">
            <text:p>19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SERNA BETANC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felipesernabetancur@gmail.com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tiven</text:p>
          </table:table-cell>
          <table:table-cell office:value-type="string">
            <text:p>Serna Lo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rnalopezstiven9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AIBER</text:p>
          </table:table-cell>
          <table:table-cell office:value-type="string">
            <text:p>SERNA MONT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iberserna26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natan Andrés</text:p>
          </table:table-cell>
          <table:table-cell office:value-type="string">
            <text:p>Sie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a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.00">
            <text:p>2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 CRISTINA</text:p>
          </table:table-cell>
          <table:table-cell office:value-type="string">
            <text:p>SIE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rene.diosa27@hotmail.com</text:p>
          </table:table-cell>
          <table:table-cell office:value-type="float" office:value="7.83">
            <text:p>7.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83">
            <text:p>7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ENDY</text:p>
          </table:table-cell>
          <table:table-cell office:value-type="string">
            <text:p>SIERRA PANES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ndysierra2405@gmail.com</text:p>
          </table:table-cell>
          <table:table-cell office:value-type="float" office:value="8.67">
            <text:p>8.67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67">
            <text:p>22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dolfo Enrique</text:p>
          </table:table-cell>
          <table:table-cell office:value-type="string">
            <text:p>Sil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dolfoess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n Eduar</text:p>
          </table:table-cell>
          <table:table-cell office:value-type="string">
            <text:p>Sil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hnsilva@gmail.com</text:p>
          </table:table-cell>
          <table:table-cell office:value-type="float" office:value="7.83">
            <text:p>7.83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0.58">
            <text:p>20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LLIAM RAFAEL</text:p>
          </table:table-cell>
          <table:table-cell office:value-type="string">
            <text:p>SIL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s81906@gmail.com</text:p>
          </table:table-cell>
          <table:table-cell office:value-type="float" office:value="7.83">
            <text:p>7.83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0.83">
            <text:p>20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jandro David</text:p>
          </table:table-cell>
          <table:table-cell office:value-type="string">
            <text:p>Silveira Arm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androdavidvenezuela@gmail.com</text:p>
          </table:table-cell>
          <table:table-cell office:value-type="float" office:value="7.83">
            <text:p>7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7.83">
            <text:p>17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Carlos</text:p>
          </table:table-cell>
          <table:table-cell office:value-type="string">
            <text:p>Solano Reino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rey701@hotmail.com</text:p>
          </table:table-cell>
          <table:table-cell office:value-type="float" office:value="7.17">
            <text:p>7.1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17">
            <text:p>7.1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Z CARIME</text:p>
          </table:table-cell>
          <table:table-cell office:value-type="string">
            <text:p>SOLANO ZAPA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ZCARIMESOLANOZAPAT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Henry Orlando</text:p>
          </table:table-cell>
          <table:table-cell office:value-type="string">
            <text:p>Solorzano Aul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nryo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ABIO NELSON</text:p>
          </table:table-cell>
          <table:table-cell office:value-type="string">
            <text:p>SOSSA GUTIER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biosossa53@gmail.com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mila Isabel</text:p>
          </table:table-cell>
          <table:table-cell office:value-type="string">
            <text:p>So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milais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nuel Alejandro</text:p>
          </table:table-cell>
          <table:table-cell office:value-type="string">
            <text:p>So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uelsoto12@gn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einaldo Ivan</text:p>
          </table:table-cell>
          <table:table-cell office:value-type="string">
            <text:p>So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inaldo.soto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NY JOSE</text:p>
          </table:table-cell>
          <table:table-cell office:value-type="string">
            <text:p>SOTO ACEVE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CORREO111@GMAIL.COM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6.00">
            <text:p>16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anser</text:p>
          </table:table-cell>
          <table:table-cell office:value-type="string">
            <text:p>Sthorm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hanser24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aime Luis</text:p>
          </table:table-cell>
          <table:table-cell office:value-type="string">
            <text:p>Su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imeluis@gmail.com</text:p>
          </table:table-cell>
          <table:table-cell office:value-type="float" office:value="7.83">
            <text:p>7.83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0.83">
            <text:p>20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Esteban</text:p>
          </table:table-cell>
          <table:table-cell office:value-type="string">
            <text:p>Suá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es1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ina Marcela</text:p>
          </table:table-cell>
          <table:table-cell office:value-type="string">
            <text:p>Suárez Angari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wer@gmail.com</text:p>
          </table:table-cell>
          <table:table-cell office:value-type="float" office:value="9.83">
            <text:p>9.83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8.58">
            <text:p>18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Y ALEJANDRA</text:p>
          </table:table-cell>
          <table:table-cell office:value-type="string">
            <text:p>SUAREZ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.suarez@firplak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7.75">
            <text:p>17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GELA IVONE</text:p>
          </table:table-cell>
          <table:table-cell office:value-type="string">
            <text:p>TABORDA MADRON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gela.taborda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ISON FERNANDO</text:p>
          </table:table-cell>
          <table:table-cell office:value-type="string">
            <text:p>TABORDA MORE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i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RLEY GUILLERMO</text:p>
          </table:table-cell>
          <table:table-cell office:value-type="string">
            <text:p>TABORDA TOR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ley.taborda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Taborda Upegu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abordaupeguisantiag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ERARDO SANTOS</text:p>
          </table:table-cell>
          <table:table-cell office:value-type="string">
            <text:p>TALAIGUA PACHE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rar@gmail.com</text:p>
          </table:table-cell>
          <table:table-cell office:value-type="float" office:value="7.83">
            <text:p>7.83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1.83">
            <text:p>21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vid alexander</text:p>
          </table:table-cell>
          <table:table-cell office:value-type="string">
            <text:p>Tavera roj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vid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IRJAN ALEXANDER</text:p>
          </table:table-cell>
          <table:table-cell office:value-type="string">
            <text:p>TEJADA FER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andertejada29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 Arturo</text:p>
          </table:table-cell>
          <table:table-cell office:value-type="string">
            <text:p>Tejada Lar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jadad8@gmail.com</text:p>
          </table:table-cell>
          <table:table-cell office:value-type="float" office:value="8.50">
            <text:p>8.5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50">
            <text:p>22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</text:p>
          </table:table-cell>
          <table:table-cell office:value-type="string">
            <text:p>Tere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teresa.lopez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ALEXANDER</text:p>
          </table:table-cell>
          <table:table-cell office:value-type="string">
            <text:p>TIPTON PE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jkgm@gmail.com</text:p>
          </table:table-cell>
          <table:table-cell office:value-type="float" office:value="8.50">
            <text:p>8.5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7.25">
            <text:p>17.2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Estiven</text:p>
          </table:table-cell>
          <table:table-cell office:value-type="string">
            <text:p>Tique Mur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onstiventique@gmail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float" office:value="5.00">
            <text:p>5.00</text:p>
          </table:table-cell>
          <table:table-cell office:value-type="float" office:value="22.75">
            <text:p>22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celo</text:p>
          </table:table-cell>
          <table:table-cell office:value-type="string">
            <text:p>Tira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celotirado11@gmail.com</text:p>
          </table:table-cell>
          <table:table-cell office:value-type="float" office:value="8.83">
            <text:p>8.83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3.83">
            <text:p>23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eivis Alexis</text:p>
          </table:table-cell>
          <table:table-cell office:value-type="string">
            <text:p>Tirado Gale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ivisalexis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OHAN ALEXIS</text:p>
          </table:table-cell>
          <table:table-cell office:value-type="string">
            <text:p>TIRADO HERR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is.tirado@FIRPLAK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abio Nelson</text:p>
          </table:table-cell>
          <table:table-cell office:value-type="string">
            <text:p>Tobar Pinz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bio.tobar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avier Alexander</text:p>
          </table:table-cell>
          <table:table-cell office:value-type="string">
            <text:p>Tobar Pinzón 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1402010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airo Esteban</text:p>
          </table:table-cell>
          <table:table-cell office:value-type="string">
            <text:p>Tobar Rodri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iroestebantobar97@icloud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ESAR AUGUSTO</text:p>
          </table:table-cell>
          <table:table-cell office:value-type="string">
            <text:p>TOBON ALZ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agustobon75@outlook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Tobón Villeg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gi.rxa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83">
            <text:p>19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BASTIAN</text:p>
          </table:table-cell>
          <table:table-cell office:value-type="string">
            <text:p>TORO ARREDO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ro.sebastian95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loria Patricia</text:p>
          </table:table-cell>
          <table:table-cell office:value-type="string">
            <text:p>Toro Espino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tricia.tor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TORO GOM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rogomezandr@gmail.com</text:p>
          </table:table-cell>
          <table:table-cell office:value-type="float" office:value="8.83">
            <text:p>8.83</text:p>
          </table:table-cell>
          <table:table-cell office:value-type="float" office:value="8.75">
            <text:p>8.75</text:p>
          </table:table-cell>
          <table:table-cell office:value-type="float" office:value="5.00">
            <text:p>5.00</text:p>
          </table:table-cell>
          <table:table-cell office:value-type="float" office:value="22.58">
            <text:p>22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iego</text:p>
          </table:table-cell>
          <table:table-cell office:value-type="string">
            <text:p>Tor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welr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einer Stiven</text:p>
          </table:table-cell>
          <table:table-cell office:value-type="string">
            <text:p>Tor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einertorres@gmail.com</text:p>
          </table:table-cell>
          <table:table-cell office:value-type="float" office:value="9.67">
            <text:p>9.67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67">
            <text:p>24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Enrique</text:p>
          </table:table-cell>
          <table:table-cell office:value-type="string">
            <text:p>Torres Batis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2024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1.00">
            <text:p>21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nuela</text:p>
          </table:table-cell>
          <table:table-cell office:value-type="string">
            <text:p>Torres C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uela.torres211@tau.usbmed.edu.co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Willy</text:p>
          </table:table-cell>
          <table:table-cell office:value-type="string">
            <text:p>Torres Estr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lytorres705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 DANIEL</text:p>
          </table:table-cell>
          <table:table-cell office:value-type="string">
            <text:p>TORRES GAMBO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gamboa050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iguel Angel</text:p>
          </table:table-cell>
          <table:table-cell office:value-type="string">
            <text:p>Torres Mar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guelangelmarin041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PABLO</text:p>
          </table:table-cell>
          <table:table-cell office:value-type="string">
            <text:p>TORRES TABOR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blo.torres@firpla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ELLY VANESSA</text:p>
          </table:table-cell>
          <table:table-cell office:value-type="string">
            <text:p>TORRES TOR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dilla.guerreo18e@gmail.con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Gregorio</text:p>
          </table:table-cell>
          <table:table-cell office:value-type="string">
            <text:p>Tortol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gregorio@gmail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21.75">
            <text:p>21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Hernando</text:p>
          </table:table-cell>
          <table:table-cell office:value-type="string">
            <text:p>Tovar Mendo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ercialcali@behome.com.co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elipe</text:p>
          </table:table-cell>
          <table:table-cell office:value-type="string">
            <text:p>Trujillo Jaram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ujillojaramillofe7482@gmail.com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Neber</text:p>
          </table:table-cell>
          <table:table-cell office:value-type="string">
            <text:p>Tuberquía Góm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dppg@gmail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7.75">
            <text:p>17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RWIN JOSE</text:p>
          </table:table-cell>
          <table:table-cell office:value-type="string">
            <text:p>TURIZO YE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rwinturizo9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n Elber</text:p>
          </table:table-cell>
          <table:table-cell office:value-type="string">
            <text:p>Ubarnes Tapi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hne@g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GE</text:p>
          </table:table-cell>
          <table:table-cell office:value-type="string">
            <text:p>URAN MOSQU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rgeuran1391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83">
            <text:p>19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URAN QUIR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iago180315@hotmail.com</text:p>
          </table:table-cell>
          <table:table-cell office:value-type="float" office:value="6.83">
            <text:p>6.83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5.58">
            <text:p>15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STEBAN CALEB</text:p>
          </table:table-cell>
          <table:table-cell office:value-type="string">
            <text:p>URANGO GUISA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tebanurango98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y</text:p>
          </table:table-cell>
          <table:table-cell office:value-type="string">
            <text:p>Uribe C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yuribecano625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Uribe Corra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i17uc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HÉCTOR LUIS</text:p>
          </table:table-cell>
          <table:table-cell office:value-type="string">
            <text:p>URIBE GALL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éctor.uribe@hot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HECTOR LUIS</text:p>
          </table:table-cell>
          <table:table-cell office:value-type="string">
            <text:p>URREGO MORE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RREGOMORENOHECTORLUIS@GMAIL.COM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ENNED ADOLFO</text:p>
          </table:table-cell>
          <table:table-cell office:value-type="string">
            <text:p>URZOLA SOL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rzolasolanoa472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ANIEL</text:p>
          </table:table-cell>
          <table:table-cell office:value-type="string">
            <text:p>USM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smejuand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ERSON CAMILO</text:p>
          </table:table-cell>
          <table:table-cell office:value-type="string">
            <text:p>USUG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ersonusugac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orman Alberto</text:p>
          </table:table-cell>
          <table:table-cell office:value-type="string">
            <text:p>Vabuena Jaim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ormanaa@gmail.com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AN CARLOS</text:p>
          </table:table-cell>
          <table:table-cell office:value-type="string">
            <text:p>VALDES BANQU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ancar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n Fredy</text:p>
          </table:table-cell>
          <table:table-cell office:value-type="string">
            <text:p>Valen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hnfredyvalenciaalvarez@gmail.com</text:p>
          </table:table-cell>
          <table:table-cell office:value-type="float" office:value="7.00">
            <text:p>7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5.75">
            <text:p>15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ENRIQUE</text:p>
          </table:table-cell>
          <table:table-cell office:value-type="string">
            <text:p>VALENCIA BURITIC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ae531@hot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83">
            <text:p>19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milo</text:p>
          </table:table-cell>
          <table:table-cell office:value-type="string">
            <text:p>Valencia Ló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lovalencia54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ria Isabel</text:p>
          </table:table-cell>
          <table:table-cell office:value-type="string">
            <text:p>Valencia Sá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a.isa.112213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IEGO</text:p>
          </table:table-cell>
          <table:table-cell office:value-type="string">
            <text:p>VALENCIA SANTAMAR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valenciasantamaria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és Felipe</text:p>
          </table:table-cell>
          <table:table-cell office:value-type="string">
            <text:p>Vallej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fv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ener Jose</text:p>
          </table:table-cell>
          <table:table-cell office:value-type="string">
            <text:p>Vanegas Medi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nerj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hn Byron</text:p>
          </table:table-cell>
          <table:table-cell office:value-type="string">
            <text:p>Vanegas Rami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hn-byron10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VANEGAS RODRI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fv101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AURA VANESSA</text:p>
          </table:table-cell>
          <table:table-cell office:value-type="string">
            <text:p>VANEGAS VAS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anegaslauravasquez7489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VANESSA</text:p>
          </table:table-cell>
          <table:table-cell office:value-type="string">
            <text:p>VANEGAS V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anegasv9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Hariana Marcela</text:p>
          </table:table-cell>
          <table:table-cell office:value-type="string">
            <text:p>Varela Benít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rianavarel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Andres</text:p>
          </table:table-cell>
          <table:table-cell office:value-type="string">
            <text:p>Varg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.a.vargas301090@g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avid</text:p>
          </table:table-cell>
          <table:table-cell office:value-type="string">
            <text:p>Varg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itjdv3010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 ALEXIS</text:p>
          </table:table-cell>
          <table:table-cell office:value-type="string">
            <text:p>VARGAS BENJUM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alexis1999@outlook.es</text:p>
          </table:table-cell>
          <table:table-cell office:value-type="float" office:value="8.83">
            <text:p>8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83">
            <text:p>18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VASCO COLORA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fvasco@outlook.com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teo</text:p>
          </table:table-cell>
          <table:table-cell office:value-type="string">
            <text:p>Vasco Ospi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teovascobuitrag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</text:p>
          </table:table-cell>
          <table:table-cell office:value-type="string">
            <text:p>Vásquez Aceve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v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lian</text:p>
          </table:table-cell>
          <table:table-cell office:value-type="string">
            <text:p>Vásquez Ama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lianva@gmail.com</text:p>
          </table:table-cell>
          <table:table-cell office:value-type="float" office:value="8.83">
            <text:p>8.83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7.58">
            <text:p>17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FELIPE</text:p>
          </table:table-cell>
          <table:table-cell office:value-type="string">
            <text:p>VASQUEZ HURTA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.vasquez@firplak.com</text:p>
          </table:table-cell>
          <table:table-cell office:value-type="float" office:value="8.00">
            <text:p>8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6.75">
            <text:p>16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imer Alejandro</text:p>
          </table:table-cell>
          <table:table-cell office:value-type="string">
            <text:p>Vásquez Londo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imeralejandro07@gmail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float" office:value="2.00">
            <text:p>2.00</text:p>
          </table:table-cell>
          <table:table-cell office:value-type="float" office:value="19.75">
            <text:p>19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 Marino</text:p>
          </table:table-cell>
          <table:table-cell office:value-type="string">
            <text:p>Vásquez Martí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elvasquezmartin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Alberto</text:p>
          </table:table-cell>
          <table:table-cell office:value-type="string">
            <text:p>Vasquez Tor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albertovasqueztorres@gmail.com</text:p>
          </table:table-cell>
          <table:table-cell office:value-type="float" office:value="7.50">
            <text:p>7.5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1.50">
            <text:p>21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iego</text:p>
          </table:table-cell>
          <table:table-cell office:value-type="string">
            <text:p>Vega Giral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di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David</text:p>
          </table:table-cell>
          <table:table-cell office:value-type="string">
            <text:p>Vega Zapa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gazapata1@hot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PEDRO ALEJANDRO</text:p>
          </table:table-cell>
          <table:table-cell office:value-type="string">
            <text:p>VEGAS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drovegas509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PEDRO ALEJANDRO</text:p>
          </table:table-cell>
          <table:table-cell office:value-type="string">
            <text:p>VEGAS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dro.vegas@firpla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lison Daniel</text:p>
          </table:table-cell>
          <table:table-cell office:value-type="string">
            <text:p>Velás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lisondaniel@gmail.com</text:p>
          </table:table-cell>
          <table:table-cell office:value-type="float" office:value="8.83">
            <text:p>8.83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83">
            <text:p>22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</text:p>
          </table:table-cell>
          <table:table-cell office:value-type="string">
            <text:p>Velás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vel1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EIFER</text:p>
          </table:table-cell>
          <table:table-cell office:value-type="string">
            <text:p>VELASQ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lasquezjhon381@gm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Olga Cecilia</text:p>
          </table:table-cell>
          <table:table-cell office:value-type="string">
            <text:p>Velásquez Aren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lgacvc@gmail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20.75">
            <text:p>20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z Mery</text:p>
          </table:table-cell>
          <table:table-cell office:value-type="string">
            <text:p>Velasquez Hena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z@gmail.com</text:p>
          </table:table-cell>
          <table:table-cell office:value-type="float" office:value="8.50">
            <text:p>8.5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7.25">
            <text:p>17.2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Pablo</text:p>
          </table:table-cell>
          <table:table-cell office:value-type="string">
            <text:p>Velasquez Muri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pmuriel7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FFERSON ESNEIDER</text:p>
          </table:table-cell>
          <table:table-cell office:value-type="string">
            <text:p>VELASQUEZ ROM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CORREO999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GUILLERMO ALONSO</text:p>
          </table:table-cell>
          <table:table-cell office:value-type="string">
            <text:p>VELASQUEZ SA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uillermovelasquez193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1.00">
            <text:p>21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ristian Camilo</text:p>
          </table:table-cell>
          <table:table-cell office:value-type="string">
            <text:p>Vé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irstianve@gmail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1.75">
            <text:p>21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Oscar</text:p>
          </table:table-cell>
          <table:table-cell office:value-type="string">
            <text:p>Ve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carvelez@gmail.com</text:p>
          </table:table-cell>
          <table:table-cell office:value-type="float" office:value="8.83">
            <text:p>8.83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1.83">
            <text:p>21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imon Andrés</text:p>
          </table:table-cell>
          <table:table-cell office:value-type="string">
            <text:p>Vé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imon111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lizabeth</text:p>
          </table:table-cell>
          <table:table-cell office:value-type="string">
            <text:p>Vélez Aceve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izabeth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Pablo</text:p>
          </table:table-cell>
          <table:table-cell office:value-type="string">
            <text:p>Vélez Andra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.gh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NY ALBEIMAR</text:p>
          </table:table-cell>
          <table:table-cell office:value-type="string">
            <text:p>VELEZ CA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beimar21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EBASTIAN</text:p>
          </table:table-cell>
          <table:table-cell office:value-type="string">
            <text:p>VELEZ CASTAÑE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bastiancastaned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ver</text:p>
          </table:table-cell>
          <table:table-cell office:value-type="string">
            <text:p>Vélez Galle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ver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teo</text:p>
          </table:table-cell>
          <table:table-cell office:value-type="string">
            <text:p>Velez Gom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teo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83">
            <text:p>23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AULKNER DAVID</text:p>
          </table:table-cell>
          <table:table-cell office:value-type="string">
            <text:p>VELEZ HENA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lezhenaofaulkner@gmail.com</text:p>
          </table:table-cell>
          <table:table-cell office:value-type="float" office:value="9.83">
            <text:p>9.83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83">
            <text:p>23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Vélez Hincapié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felipev118@gmail.com</text:p>
          </table:table-cell>
          <table:table-cell office:value-type="float" office:value="9.50">
            <text:p>9.5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50">
            <text:p>22.5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VELEZ PORT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UWVEL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FREDY</text:p>
          </table:table-cell>
          <table:table-cell office:value-type="string">
            <text:p>VELEZ PULGAR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gael403@gmail.com</text:p>
          </table:table-cell>
          <table:table-cell office:value-type="float" office:value="5.83">
            <text:p>5.83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4.58">
            <text:p>14.58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eferson</text:p>
          </table:table-cell>
          <table:table-cell office:value-type="string">
            <text:p>Vélez Sánch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nn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CAMILO</text:p>
          </table:table-cell>
          <table:table-cell office:value-type="string">
            <text:p>VELEZ SER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amilo28470@gmail.com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7.00">
            <text:p>17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varo</text:p>
          </table:table-cell>
          <table:table-cell office:value-type="string">
            <text:p>Verga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varovergara@gmail.com</text:p>
          </table:table-cell>
          <table:table-cell office:value-type="float" office:value="7.83">
            <text:p>7.83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10.83">
            <text:p>10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a María</text:p>
          </table:table-cell>
          <table:table-cell office:value-type="string">
            <text:p>Verga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amariavergara@gmail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float" office:value="4.00">
            <text:p>4.00</text:p>
          </table:table-cell>
          <table:table-cell office:value-type="float" office:value="21.75">
            <text:p>21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Nora Elena</text:p>
          </table:table-cell>
          <table:table-cell office:value-type="string">
            <text:p>Vergara C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a.vergara@firpla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YASSER</text:p>
          </table:table-cell>
          <table:table-cell office:value-type="string">
            <text:p>VERGARA FIGUERO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rgarafigueroayasser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enneyd Anderson</text:p>
          </table:table-cell>
          <table:table-cell office:value-type="string">
            <text:p>Vergara pache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an@gmail.com</text:p>
          </table:table-cell>
          <table:table-cell office:value-type="float" office:value="7.83">
            <text:p>7.83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1.83">
            <text:p>21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HON JANDER</text:p>
          </table:table-cell>
          <table:table-cell office:value-type="string">
            <text:p>VERGARA RODRI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rgararodriguezjander34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Manuel</text:p>
          </table:table-cell>
          <table:table-cell office:value-type="string">
            <text:p>Viera Tor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eratorresjosemanuel4@gma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lián Alejandro</text:p>
          </table:table-cell>
          <table:table-cell office:value-type="string">
            <text:p>Villa V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ovillavilla10@hotmail.com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dres</text:p>
          </table:table-cell>
          <table:table-cell office:value-type="string">
            <text:p>Vill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villada11@gmail.com</text:p>
          </table:table-cell>
          <table:table-cell office:value-type="float" office:value="5.50">
            <text:p>5.50</text:p>
          </table:table-cell>
          <table:table-cell office:value-type="float" office:value="8.75">
            <text:p>8.75</text:p>
          </table:table-cell>
          <table:table-cell office:value-type="float" office:value="3.00">
            <text:p>3.00</text:p>
          </table:table-cell>
          <table:table-cell office:value-type="float" office:value="17.25">
            <text:p>17.2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 Alejandro</text:p>
          </table:table-cell>
          <table:table-cell office:value-type="string">
            <text:p>Vill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elav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merson Alexander</text:p>
          </table:table-cell>
          <table:table-cell office:value-type="string">
            <text:p>Vill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ersonvillad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Esteban</text:p>
          </table:table-cell>
          <table:table-cell office:value-type="string">
            <text:p>Villada Agude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vacv09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NIEL ESTIBEN</text:p>
          </table:table-cell>
          <table:table-cell office:value-type="string">
            <text:p>VILLADA GOM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vg-2010.daniel@outlook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UNALDIS JOSE</text:p>
          </table:table-cell>
          <table:table-cell office:value-type="string">
            <text:p>VILLALOBOS PE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aljose2046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4.00">
            <text:p>24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ennifer</text:p>
          </table:table-cell>
          <table:table-cell office:value-type="string">
            <text:p>Villamil Jaram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ny0794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LL ALEXIS</text:p>
          </table:table-cell>
          <table:table-cell office:value-type="string">
            <text:p>VILLEGAS MONT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lvilllegas2025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Katherine</text:p>
          </table:table-cell>
          <table:table-cell office:value-type="string">
            <text:p>Villegas Pabue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ercial2@firplak.com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8.75">
            <text:p>18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xander</text:p>
          </table:table-cell>
          <table:table-cell office:value-type="string">
            <text:p>Viloria Alv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andervi@gmail.com</text:p>
          </table:table-cell>
          <table:table-cell office:value-type="float" office:value="8.33">
            <text:p>8.33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3.33">
            <text:p>23.3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nmanuel Edgardo</text:p>
          </table:table-cell>
          <table:table-cell office:value-type="string">
            <text:p>Vital Flo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inovelith@hotmail.com</text:p>
          </table:table-cell>
          <table:table-cell office:value-type="float" office:value="7.83">
            <text:p>7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7.83">
            <text:p>17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LIAS ENRIQUE</text:p>
          </table:table-cell>
          <table:table-cell office:value-type="string">
            <text:p>VITOLA MUSLA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tolae6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ANDRES</text:p>
          </table:table-cell>
          <table:table-cell office:value-type="string">
            <text:p>VIVAS OCAM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_vivas35181@elpoli.edu.co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LUIS FELIPE</text:p>
          </table:table-cell>
          <table:table-cell office:value-type="string">
            <text:p>VIVAS OCAM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vivas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Victor Manuel</text:p>
          </table:table-cell>
          <table:table-cell office:value-type="string">
            <text:p>Vivas Ocamp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vasvictor14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TALINA MARIA</text:p>
          </table:table-cell>
          <table:table-cell office:value-type="string">
            <text:p>WHITE PALAC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talina.white@firplak.com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17.75">
            <text:p>17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FERNANDO</text:p>
          </table:table-cell>
          <table:table-cell office:value-type="string">
            <text:p>YEP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ernandopinoy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jandra</text:p>
          </table:table-cell>
          <table:table-cell office:value-type="string">
            <text:p>Yepes Londo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andrayepes2012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ayanne Michelle</text:p>
          </table:table-cell>
          <table:table-cell office:value-type="string">
            <text:p>Yepes Orti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chel.yepes2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AN ESTEBAN</text:p>
          </table:table-cell>
          <table:table-cell office:value-type="string">
            <text:p>YEPEZ DI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PEZJUAN1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HAIBER ESNEIDER</text:p>
          </table:table-cell>
          <table:table-cell office:value-type="string">
            <text:p>YEPEZ MOSQU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iber12@gmail.com</text:p>
          </table:table-cell>
          <table:table-cell office:value-type="float" office:value="8.67">
            <text:p>8.67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2.67">
            <text:p>22.6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SE MANUEL</text:p>
          </table:table-cell>
          <table:table-cell office:value-type="string">
            <text:p>ZAMBRANO SER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.zambrano@firplak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ULIAN FELIPE</text:p>
          </table:table-cell>
          <table:table-cell office:value-type="string">
            <text:p>ZAPATA AGUDE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lianzapata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1.00">
            <text:p>21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ison Esteban</text:p>
          </table:table-cell>
          <table:table-cell office:value-type="string">
            <text:p>Zapata Bedo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ixon027.zapat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25.00">
            <text:p>25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Santiago</text:p>
          </table:table-cell>
          <table:table-cell office:value-type="string">
            <text:p>Zapata Betanc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iagozapata@gmail.comj</text:p>
          </table:table-cell>
          <table:table-cell office:value-type="float" office:value="9.00">
            <text:p>9.00</text:p>
          </table:table-cell>
          <table:table-cell office:value-type="float" office:value="8.75">
            <text:p>8.75</text:p>
          </table:table-cell>
          <table:table-cell office:value-type="float" office:value="5.00">
            <text:p>5.00</text:p>
          </table:table-cell>
          <table:table-cell office:value-type="float" office:value="22.75">
            <text:p>22.75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ateo</text:p>
          </table:table-cell>
          <table:table-cell office:value-type="string">
            <text:p>Zapata Carvaj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maateeoo2013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Edin Santiago</text:p>
          </table:table-cell>
          <table:table-cell office:value-type="string">
            <text:p>Zapata Fran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in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ngie Katherine</text:p>
          </table:table-cell>
          <table:table-cell office:value-type="string">
            <text:p>Zapata Herna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alentos@firplak.com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ARLOS ALBERTO</text:p>
          </table:table-cell>
          <table:table-cell office:value-type="string">
            <text:p>ZAPATA JARAM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zapatamd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William Alberto</text:p>
          </table:table-cell>
          <table:table-cell office:value-type="string">
            <text:p>Zapata Ló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liamzapata1223@outlook.es</text:p>
          </table:table-cell>
          <table:table-cell office:value-type="float" office:value="6.17">
            <text:p>6.17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6.17">
            <text:p>16.17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JORGE ANDRES</text:p>
          </table:table-cell>
          <table:table-cell office:value-type="string">
            <text:p>ZAPATA MEJ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rgea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xis</text:p>
          </table:table-cell>
          <table:table-cell office:value-type="string">
            <text:p>Zapata Pine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iszp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22.00">
            <text:p>22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CÉSAR AUGUSTO</text:p>
          </table:table-cell>
          <table:table-cell office:value-type="string">
            <text:p>ZAPATA QUINT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Zapatacesar089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Diego</text:p>
          </table:table-cell>
          <table:table-cell office:value-type="string">
            <text:p>Zapata Rod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zrodas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23.00">
            <text:p>23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Alexander de Jesús</text:p>
          </table:table-cell>
          <table:table-cell office:value-type="string">
            <text:p>Zapata Yep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zapata2710@gmail.com</text:p>
          </table:table-cell>
          <table:table-cell office:value-type="float" office:value="8.83">
            <text:p>8.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83">
            <text:p>8.83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Richar</text:p>
          </table:table-cell>
          <table:table-cell office:value-type="string">
            <text:p>Zea Arroya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ichar2010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.00">
            <text:p>1.00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  <table:table-row>
          <table:table-cell office:value-type="string">
            <text:p>Monica</text:p>
          </table:table-cell>
          <table:table-cell office:value-type="string">
            <text:p>Zuluaga Rodri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ica.zuluaga@firplak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775657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9.18 (Build: 20221114)</meta:generator>
    <meta:initial-creator>Milton David Rendón</meta:initial-creator>
    <meta:creation-date>2026-04-30T17:15:47</meta:creation-date>
    <meta:document-statistic meta:table-count="1" meta:cell-count="0" meta:object-count="0"/>
  </office:meta>
</office:document-meta>
</file>